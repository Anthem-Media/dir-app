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22-23 Fleer Ultra</text:p>
      <text:p text:style-name="Standard"/>
      <text:p text:style-name="Standard">https://www.sportscardspro.com/console/hockey-cards-2022-fleer-ultra</text:p>
      <text:p text:style-name="Standard"/>
      <text:p text:style-name="Standard">2022-23 Leaf In The Game Used</text:p>
      <text:p text:style-name="Standard"/>
      <text:p text:style-name="Standard">https://www.sportscardspro.com/console/hockey-cards-2022-leaf-in-the-game-used</text:p>
      <text:p text:style-name="Standard"/>
      <text:p text:style-name="Standard">2022-23 O-Pee-Chee</text:p>
      <text:p text:style-name="Standard"/>
      <text:p text:style-name="Standard">https://www.sportscardspro.com/console/hockey-cards-2022-o-pee-chee</text:p>
      <text:p text:style-name="Standard"/>
      <text:p text:style-name="Standard">2022-23 O-Pee-Chee Platinum</text:p>
      <text:p text:style-name="Standard"/>
      <text:p text:style-name="Standard">https://www.sportscardspro.com/console/hockey-cards-2022-o-pee-chee-platinum</text:p>
      <text:p text:style-name="Standard"/>
      <text:p text:style-name="Standard">2022-23 Parkhurst</text:p>
      <text:p text:style-name="Standard"/>
      <text:p text:style-name="Standard">https://www.sportscardspro.com/console/hockey-cards-2022-parkhurst</text:p>
      <text:p text:style-name="Standard"/>
      <text:p text:style-name="Standard">2022-23 Parkhurst Champions</text:p>
      <text:p text:style-name="Standard"/>
      <text:p text:style-name="Standard">https://www.sportscardspro.com/console/hockey-cards-2022-parkhurst-champions</text:p>
      <text:p text:style-name="Standard"/>
      <text:p text:style-name="Standard">2022-23 SkyBox Metal Universe</text:p>
      <text:p text:style-name="Standard"/>
      <text:p text:style-name="Standard">https://www.sportscardspro.com/console/hockey-cards-2022-skybox-metal-universe</text:p>
      <text:p text:style-name="Standard"/>
      <text:p text:style-name="Standard">2022-23 SP</text:p>
      <text:p text:style-name="Standard"/>
      <text:p text:style-name="Standard">https://www.sportscardspro.com/console/hockey-cards-2022-sp</text:p>
      <text:p text:style-name="Standard"/>
      <text:p text:style-name="Standard">2022-23 SP Authentic</text:p>
      <text:p text:style-name="Standard"/>
      <text:p text:style-name="Standard">https://www.sportscardspro.com/console/hockey-cards-2022-sp-authentic</text:p>
      <text:p text:style-name="Standard"/>
      <text:p text:style-name="Standard">2022-23 SP Game Used</text:p>
      <text:p text:style-name="Standard"/>
      <text:p text:style-name="Standard">https://www.sportscardspro.com/console/hockey-cards-2022-sp-game-used</text:p>
      <text:p text:style-name="Standard"/>
      <text:p text:style-name="Standard">2022-23 SPx</text:p>
      <text:p text:style-name="Standard"/>
      <text:p text:style-name="Standard">https://www.sportscardspro.com/console/hockey-cards-2022-spx</text:p>
      <text:p text:style-name="Standard"/>
      <text:p text:style-name="Standard">2022-23 Upper Deck</text:p>
      <text:p text:style-name="Standard"/>
      <text:p text:style-name="Standard">https://www.sportscardspro.com/console/hockey-cards-2022-upper-deck</text:p>
      <text:p text:style-name="Standard"/>
      <text:p text:style-name="Standard">2022-23 Upper Deck Allure</text:p>
      <text:p text:style-name="Standard"><text:soft-page-break/></text:p>
      <text:p text:style-name="Standard">https://www.sportscardspro.com/console/hockey-cards-2022-upper-deck-allure</text:p>
      <text:p text:style-name="Standard"/>
      <text:p text:style-name="Standard">2022-23 Upper Deck Artifacts</text:p>
      <text:p text:style-name="Standard"/>
      <text:p text:style-name="Standard">https://www.sportscardspro.com/console/hockey-cards-2022-upper-deck-artifacts</text:p>
      <text:p text:style-name="Standard"/>
      <text:p text:style-name="Standard">2022-23 Upper Deck Black Diamond</text:p>
      <text:p text:style-name="Standard"/>
      <text:p text:style-name="Standard">https://www.sportscardspro.com/console/hockey-cards-2022-upper-deck-black-diamond</text:p>
      <text:p text:style-name="Standard"/>
      <text:p text:style-name="Standard">2022-23 Upper Deck Clear Cut</text:p>
      <text:p text:style-name="Standard"/>
      <text:p text:style-name="Standard">https://www.sportscardspro.com/console/hockey-cards-2022-upper-deck-clear-cut</text:p>
      <text:p text:style-name="Standard"/>
      <text:p text:style-name="Standard">2022-23 Upper Deck Credentials</text:p>
      <text:p text:style-name="Standard"/>
      <text:p text:style-name="Standard">https://www.sportscardspro.com/console/hockey-cards-2022-upper-deck-credentials</text:p>
      <text:p text:style-name="Standard"/>
      <text:p text:style-name="Standard">2022-23 Upper Deck Ice</text:p>
      <text:p text:style-name="Standard"/>
      <text:p text:style-name="Standard">https://www.sportscardspro.com/console/hockey-cards-2022-upper-deck-ice</text:p>
      <text:p text:style-name="Standard"/>
      <text:p text:style-name="Standard">2022-23 Upper Deck MVP</text:p>
      <text:p text:style-name="Standard"/>
      <text:p text:style-name="Standard">https://www.sportscardspro.com/console/hockey-cards-2022-upper-deck-mvp</text:p>
      <text:p text:style-name="Standard"/>
      <text:p text:style-name="Standard">2022-23 Upper Deck Ovation</text:p>
      <text:p text:style-name="Standard"/>
      <text:p text:style-name="Standard">https://www.sportscardspro.com/console/hockey-cards-2022-upper-deck-ovation</text:p>
      <text:p text:style-name="Standard"/>
      <text:p text:style-name="Standard">2022-23 Upper Deck Premier</text:p>
      <text:p text:style-name="Standard"/>
      <text:p text:style-name="Standard">https://www.sportscardspro.com/console/hockey-cards-2022-upper-deck-premier</text:p>
      <text:p text:style-name="Standard"/>
      <text:p text:style-name="Standard">2022-23 Upper Deck Stature</text:p>
      <text:p text:style-name="Standard"/>
      <text:p text:style-name="Standard">https://www.sportscardspro.com/console/hockey-cards-2022-upper-deck-stature</text:p>
      <text:p text:style-name="Standard"/>
      <text:p text:style-name="Standard">2022-23 Upper Deck Synergy</text:p>
      <text:p text:style-name="Standard"/>
      <text:p text:style-name="Standard">https://www.sportscardspro.com/console/hockey-cards-2022-upper-deck-synergy</text:p>
      <text:p text:style-name="Standard"/>
      <text:p text:style-name="Standard">2022-23 Upper Deck The Cup</text:p>
      <text:p text:style-name="Standard"/>
      <text:p text:style-name="Standard">https://www.sportscardspro.com/console/hockey-cards-2022-upper-deck-the-cup</text:p>
      <text:p text:style-name="Standard"/>
      <text:p text:style-name="Standard">2022-23 Upper Deck Trilogy</text:p>
      <text:p text:style-name="Standard"/>
      <text:p text:style-name="Standard"><text:soft-page-break/>https://www.sportscardspro.com/console/hockey-cards-2022-upper-deck-trilogy</text:p>
      <text:p text:style-name="Standard"/>
      <text:p text:style-name="Standard">2022-23 Upper Deck Ultimate Collection</text:p>
      <text:p text:style-name="Standard"/>
      <text:p text:style-name="Standard">https://www.sportscardspro.com/console/hockey-cards-2022-upper-deck-ultimate-coll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3:01:14</meta:creation-date>
    <meta:document-statistic meta:table-count="0" meta:image-count="0" meta:object-count="0" meta:page-count="3" meta:paragraph-count="52" meta:word-count="123" meta:character-count="2526"/>
    <dc:date>2026-06-21T13:01:56</dc:date>
    <dc:creator>zach seabolt</dc:creator>
    <meta:editing-duration>PT42S</meta:editing-duration>
    <meta:editing-cycles>1</meta:editing-cycles>
    <meta:generator>OpenOffice/4.1.11$Unix OpenOffice.org_project/4111m1$Build-9808</meta:generator>
  </office:meta>
</office:document-meta>
</file>