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3 Clearly Donruss</text:p>
      <text:p text:style-name="Standard"/>
      <text:p text:style-name="Standard">https://www.sportscardspro.com/console/football-cards-2023-clearly-donruss</text:p>
      <text:p text:style-name="Standard"/>
      <text:p text:style-name="Standard">2023 Donruss</text:p>
      <text:p text:style-name="Standard"/>
      <text:p text:style-name="Standard">https://www.sportscardspro.com/console/football-cards-2023-donruss</text:p>
      <text:p text:style-name="Standard"/>
      <text:p text:style-name="Standard">2023 Donruss Elite</text:p>
      <text:p text:style-name="Standard"/>
      <text:p text:style-name="Standard">https://www.sportscardspro.com/console/football-cards-2023-donruss-elite</text:p>
      <text:p text:style-name="Standard"/>
      <text:p text:style-name="Standard">2023 Donruss Optic</text:p>
      <text:p text:style-name="Standard"/>
      <text:p text:style-name="Standard">https://www.sportscardspro.com/console/football-cards-2023-donruss-optic</text:p>
      <text:p text:style-name="Standard"/>
      <text:p text:style-name="Standard">2023 Panini Absolute</text:p>
      <text:p text:style-name="Standard"/>
      <text:p text:style-name="Standard">https://www.sportscardspro.com/console/football-cards-2023-panini-absolute</text:p>
      <text:p text:style-name="Standard"/>
      <text:p text:style-name="Standard">2023 Panini Black</text:p>
      <text:p text:style-name="Standard"/>
      <text:p text:style-name="Standard">https://www.sportscardspro.com/console/football-cards-2023-panini-black</text:p>
      <text:p text:style-name="Standard"/>
      <text:p text:style-name="Standard">2023 Panini Certified</text:p>
      <text:p text:style-name="Standard"/>
      <text:p text:style-name="Standard">https://www.sportscardspro.com/console/football-cards-2023-panini-certified</text:p>
      <text:p text:style-name="Standard"/>
      <text:p text:style-name="Standard">2023 Panini Contenders</text:p>
      <text:p text:style-name="Standard"/>
      <text:p text:style-name="Standard">https://www.sportscardspro.com/console/football-cards-2023-panini-contenders</text:p>
      <text:p text:style-name="Standard"/>
      <text:p text:style-name="Standard">2023 Panini Contenders Optic</text:p>
      <text:p text:style-name="Standard"/>
      <text:p text:style-name="Standard">https://www.sportscardspro.com/console/football-cards-2023-panini-contenders-optic</text:p>
      <text:p text:style-name="Standard"/>
      <text:p text:style-name="Standard">2023 Panini Flawless</text:p>
      <text:p text:style-name="Standard"/>
      <text:p text:style-name="Standard">https://www.sportscardspro.com/console/football-cards-2023-panini-flawless</text:p>
      <text:p text:style-name="Standard"/>
      <text:p text:style-name="Standard">2023 Panini Gold Standard</text:p>
      <text:p text:style-name="Standard"/>
      <text:p text:style-name="Standard">https://www.sportscardspro.com/console/football-cards-2023-panini-gold-standard</text:p>
      <text:p text:style-name="Standard"/>
      <text:p text:style-name="Standard">2023 Panini Illusions</text:p>
      <text:p text:style-name="Standard"/>
      <text:p text:style-name="Standard">https://www.sportscardspro.com/console/football-cards-2023-panini-illusions</text:p>
      <text:p text:style-name="Standard"/>
      <text:p text:style-name="Standard">2023 Panini Immaculate Collection</text:p>
      <text:p text:style-name="Standard"><text:soft-page-break/></text:p>
      <text:p text:style-name="Standard">https://www.sportscardspro.com/console/football-cards-2023-panini-immaculate-collection</text:p>
      <text:p text:style-name="Standard"/>
      <text:p text:style-name="Standard">2023 Panini Impeccable</text:p>
      <text:p text:style-name="Standard"/>
      <text:p text:style-name="Standard">https://www.sportscardspro.com/console/football-cards-2023-panini-impeccable</text:p>
      <text:p text:style-name="Standard"/>
      <text:p text:style-name="Standard">2023 Panini Legacy</text:p>
      <text:p text:style-name="Standard"/>
      <text:p text:style-name="Standard">https://www.sportscardspro.com/console/football-cards-2023-panini-legacy</text:p>
      <text:p text:style-name="Standard"/>
      <text:p text:style-name="Standard">2023 Panini Limited</text:p>
      <text:p text:style-name="Standard"/>
      <text:p text:style-name="Standard">https://www.sportscardspro.com/console/football-cards-2023-panini-limited</text:p>
      <text:p text:style-name="Standard"/>
      <text:p text:style-name="Standard">2023 Panini Luminance</text:p>
      <text:p text:style-name="Standard"/>
      <text:p text:style-name="Standard">https://www.sportscardspro.com/console/football-cards-2023-panini-luminance</text:p>
      <text:p text:style-name="Standard"/>
      <text:p text:style-name="Standard">2023 Panini Mosaic</text:p>
      <text:p text:style-name="Standard"/>
      <text:p text:style-name="Standard">https://www.sportscardspro.com/console/football-cards-2023-panini-mosaic</text:p>
      <text:p text:style-name="Standard"/>
      <text:p text:style-name="Standard">2023 Panini National Treasures</text:p>
      <text:p text:style-name="Standard"/>
      <text:p text:style-name="Standard">https://www.sportscardspro.com/console/football-cards-2023-panini-national-treasures</text:p>
      <text:p text:style-name="Standard"/>
      <text:p text:style-name="Standard">2023 Panini Obsidian</text:p>
      <text:p text:style-name="Standard"/>
      <text:p text:style-name="Standard">https://www.sportscardspro.com/console/football-cards-2023-panini-obsidian</text:p>
      <text:p text:style-name="Standard"/>
      <text:p text:style-name="Standard">2023 Panini One</text:p>
      <text:p text:style-name="Standard"/>
      <text:p text:style-name="Standard">https://www.sportscardspro.com/console/football-cards-2023-panini-one</text:p>
      <text:p text:style-name="Standard"/>
      <text:p text:style-name="Standard">2023 Panini Origins</text:p>
      <text:p text:style-name="Standard"/>
      <text:p text:style-name="Standard">https://www.sportscardspro.com/console/football-cards-2023-panini-origins</text:p>
      <text:p text:style-name="Standard"/>
      <text:p text:style-name="Standard">2023 Panini Phoenix</text:p>
      <text:p text:style-name="Standard"/>
      <text:p text:style-name="Standard">https://www.sportscardspro.com/console/football-cards-2023-panini-phoenix</text:p>
      <text:p text:style-name="Standard"/>
      <text:p text:style-name="Standard">2023 Panini Plates &amp; Patches</text:p>
      <text:p text:style-name="Standard"/>
      <text:p text:style-name="Standard">https://www.sportscardspro.com/console/football-cards-2023-panini-plates-and-patches</text:p>
      <text:p text:style-name="Standard"/>
      <text:p text:style-name="Standard">2023 Panini Prestige</text:p>
      <text:p text:style-name="Standard"/>
      <text:p text:style-name="Standard"><text:soft-page-break/>https://www.sportscardspro.com/console/football-cards-2023-panini-prestige</text:p>
      <text:p text:style-name="Standard"/>
      <text:p text:style-name="Standard">2023 Panini Prizm</text:p>
      <text:p text:style-name="Standard"/>
      <text:p text:style-name="Standard">https://www.sportscardspro.com/console/football-cards-2023-panini-prizm</text:p>
      <text:p text:style-name="Standard"/>
      <text:p text:style-name="Standard">2023 Panini Rookies &amp; Stars</text:p>
      <text:p text:style-name="Standard"/>
      <text:p text:style-name="Standard">https://www.sportscardspro.com/console/football-cards-2023-panini-rookies-and-stars</text:p>
      <text:p text:style-name="Standard"/>
      <text:p text:style-name="Standard">2023 Panini Select</text:p>
      <text:p text:style-name="Standard"/>
      <text:p text:style-name="Standard">https://www.sportscardspro.com/console/football-cards-2023-panini-select</text:p>
      <text:p text:style-name="Standard"/>
      <text:p text:style-name="Standard">2023 Panini Spectra</text:p>
      <text:p text:style-name="Standard"/>
      <text:p text:style-name="Standard">https://www.sportscardspro.com/console/football-cards-2023-panini-spectra</text:p>
      <text:p text:style-name="Standard"/>
      <text:p text:style-name="Standard">2023 Panini Zenith</text:p>
      <text:p text:style-name="Standard"/>
      <text:p text:style-name="Standard">https://www.sportscardspro.com/console/football-cards-2023-panini-zenith</text:p>
      <text:p text:style-name="Standard"/>
      <text:p text:style-name="Standard">2023 Score</text:p>
      <text:p text:style-name="Standard"/>
      <text:p text:style-name="Standard">https://www.sportscardspro.com/console/football-cards-2023-score</text:p>
      <text:p text:style-name="Standard"/>
      <text:p text:style-name="Standard">2023 Topps Composite</text:p>
      <text:p text:style-name="Standard"/>
      <text:p text:style-name="Standard">https://www.sportscardspro.com/console/football-cards-2023-topps-composite</text:p>
      <text:p text:style-name="Standard"/>
      <text:p text:style-name="Standard">2023 Topps Motif</text:p>
      <text:p text:style-name="Standard"/>
      <text:p text:style-name="Standard">https://www.sportscardspro.com/console/football-cards-2023-topps-motif</text:p>
      <text:p text:style-name="Standard"/>
      <text:p text:style-name="Standard">2023 Upper Deck USFL</text:p>
      <text:p text:style-name="Standard"/>
      <text:p text:style-name="Standard">https://www.sportscardspro.com/console/football-cards-2023-upper-deck-usfl</text:p>
      <text:p text:style-name="Standard"/>
      <text:p text:style-name="Standard">2023 Upper Deck USFL Season Preview</text:p>
      <text:p text:style-name="Standard"/>
      <text:p text:style-name="Standard">https://www.sportscardspro.com/console/football-cards-2023-upper-deck-usfl-season-pre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29:51</meta:creation-date>
    <meta:document-statistic meta:table-count="0" meta:image-count="0" meta:object-count="0" meta:page-count="3" meta:paragraph-count="70" meta:word-count="150" meta:character-count="3342"/>
    <dc:date>2026-06-21T13:30:01</dc:date>
    <dc:creator>zach seabolt</dc:creator>
    <meta:editing-duration>PT10S</meta:editing-duration>
    <meta:editing-cycles>1</meta:editing-cycles>
    <meta:generator>OpenOffice/4.1.11$Unix OpenOffice.org_project/4111m1$Build-9808</meta:generator>
  </office:meta>
</office:document-meta>
</file>