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8 Donruss</text:p>
      <text:p text:style-name="Standard">https://www.sportscardspro.com/console/basketball-cards-2018-panini-donruss</text:p>
      <text:p text:style-name="Standard"/>
      <text:p text:style-name="Standard">2018 Donruss Optic</text:p>
      <text:p text:style-name="Standard">https://www.sportscardspro.com/console/basketball-cards-2018-panini-donruss-optic</text:p>
      <text:p text:style-name="Standard"/>
      <text:p text:style-name="Standard">2018 Hoops</text:p>
      <text:p text:style-name="Standard">https://www.sportscardspro.com/console/basketball-cards-2018-panini-hoops</text:p>
      <text:p text:style-name="Standard"/>
      <text:p text:style-name="Standard">2018 Hoops Winter</text:p>
      <text:p text:style-name="Standard">https://www.sportscardspro.com/console/basketball-cards-2018-panini-hoops-winter</text:p>
      <text:p text:style-name="Standard"/>
      <text:p text:style-name="Standard">2018 Panini Absolute Memorabilia</text:p>
      <text:p text:style-name="Standard">https://www.sportscardspro.com/console/basketball-cards-2018-panini-absolute-memorabilia</text:p>
      <text:p text:style-name="Standard"/>
      <text:p text:style-name="Standard">2018 Panini Certified</text:p>
      <text:p text:style-name="Standard">https://www.sportscardspro.com/console/basketball-cards-2018-panini-certified</text:p>
      <text:p text:style-name="Standard"/>
      <text:p text:style-name="Standard">2018 Panini Chronicles</text:p>
      <text:p text:style-name="Standard">https://www.sportscardspro.com/console/basketball-cards-2018-panini-chronicles</text:p>
      <text:p text:style-name="Standard"/>
      <text:p text:style-name="Standard">2018 Panini Contenders</text:p>
      <text:p text:style-name="Standard">https://www.sportscardspro.com/console/basketball-cards-2018-panini-contenders</text:p>
      <text:p text:style-name="Standard"/>
      <text:p text:style-name="Standard">2018 Panini Contenders Optic</text:p>
      <text:p text:style-name="Standard">https://www.sportscardspro.com/console/basketball-cards-2018-panini-contenders-optic</text:p>
      <text:p text:style-name="Standard"/>
      <text:p text:style-name="Standard">2018 Panini Cornerstones</text:p>
      <text:p text:style-name="Standard">https://www.sportscardspro.com/console/basketball-cards-2018-panini-cornerstones</text:p>
      <text:p text:style-name="Standard"/>
      <text:p text:style-name="Standard">2018 Panini Court Kings</text:p>
      <text:p text:style-name="Standard">https://www.sportscardspro.com/console/basketball-cards-2018-panini-court-kings</text:p>
      <text:p text:style-name="Standard"/>
      <text:p text:style-name="Standard">2018 Panini Crown Royale</text:p>
      <text:p text:style-name="Standard">https://www.sportscardspro.com/console/basketball-cards-2018-panini-crown-royale</text:p>
      <text:p text:style-name="Standard"/>
      <text:p text:style-name="Standard">2018 Panini Dominion</text:p>
      <text:p text:style-name="Standard">https://www.sportscardspro.com/console/basketball-cards-2018-panini-dominion</text:p>
      <text:p text:style-name="Standard"/>
      <text:p text:style-name="Standard">2018 Panini Encased</text:p>
      <text:p text:style-name="Standard">https://www.sportscardspro.com/console/basketball-cards-2018-panini-encased</text:p>
      <text:p text:style-name="Standard"/>
      <text:p text:style-name="Standard">2018 Panini Flawless</text:p>
      <text:p text:style-name="Standard">https://www.sportscardspro.com/console/basketball-cards-2018-panini-flawless</text:p>
      <text:p text:style-name="Standard"/>
      <text:p text:style-name="Standard">2018 Panini Immaculate Collection</text:p>
      <text:p text:style-name="Standard">https://www.sportscardspro.com/console/basketball-cards-2018-panini-immaculate-collection</text:p>
      <text:p text:style-name="Standard"/>
      <text:p text:style-name="Standard">2018 Panini Impeccable</text:p>
      <text:p text:style-name="Standard"><text:soft-page-break/>https://www.sportscardspro.com/console/basketball-cards-2018-panini-impeccable</text:p>
      <text:p text:style-name="Standard"/>
      <text:p text:style-name="Standard">2018 Panini Mosaic Prizm</text:p>
      <text:p text:style-name="Standard">https://www.sportscardspro.com/console/basketball-cards-2018-panini-mosaic-prizm</text:p>
      <text:p text:style-name="Standard"/>
      <text:p text:style-name="Standard">2018 Panini National Treasures</text:p>
      <text:p text:style-name="Standard">https://www.sportscardspro.com/console/basketball-cards-2018-panini-national-treasures</text:p>
      <text:p text:style-name="Standard"/>
      <text:p text:style-name="Standard">2018 Panini Noir</text:p>
      <text:p text:style-name="Standard">https://www.sportscardspro.com/console/basketball-cards-2018-panini-noir</text:p>
      <text:p text:style-name="Standard"/>
      <text:p text:style-name="Standard">2018 Panini Obsidian</text:p>
      <text:p text:style-name="Standard">https://www.sportscardspro.com/console/basketball-cards-2018-panini-obsidian</text:p>
      <text:p text:style-name="Standard"/>
      <text:p text:style-name="Standard">2018 Panini Opulence</text:p>
      <text:p text:style-name="Standard">https://www.sportscardspro.com/console/basketball-cards-2018-panini-opulence</text:p>
      <text:p text:style-name="Standard"/>
      <text:p text:style-name="Standard">2018 Panini Prizm</text:p>
      <text:p text:style-name="Standard">https://www.sportscardspro.com/console/basketball-cards-2018-panini-prizm</text:p>
      <text:p text:style-name="Standard"/>
      <text:p text:style-name="Standard">2018 Panini Revolution</text:p>
      <text:p text:style-name="Standard">https://www.sportscardspro.com/console/basketball-cards-2018-panini-revolution</text:p>
      <text:p text:style-name="Standard"/>
      <text:p text:style-name="Standard">2018 Panini Select</text:p>
      <text:p text:style-name="Standard">https://www.sportscardspro.com/console/basketball-cards-2018-panini-select</text:p>
      <text:p text:style-name="Standard"/>
      <text:p text:style-name="Standard">2018 Panini Spectra</text:p>
      <text:p text:style-name="Standard">https://www.sportscardspro.com/console/basketball-cards-2018-panini-spectra</text:p>
      <text:p text:style-name="Standard"/>
      <text:p text:style-name="Standard">2018 Panini Status</text:p>
      <text:p text:style-name="Standard">https://www.sportscardspro.com/console/basketball-cards-2018-panini-status</text:p>
      <text:p text:style-name="Standard"/>
      <text:p text:style-name="Standard">2018 Panini Threads</text:p>
      <text:p text:style-name="Standard">https://www.sportscardspro.com/console/basketball-cards-2018-panini-thre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4:30:43</meta:creation-date>
    <dc:date>2026-06-21T15:41:01</dc:date>
    <dc:creator>zach seabolt</dc:creator>
    <meta:editing-duration>PT37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2" meta:paragraph-count="56" meta:word-count="117" meta:character-count="2776"/>
  </office:meta>
</office:document-meta>
</file>