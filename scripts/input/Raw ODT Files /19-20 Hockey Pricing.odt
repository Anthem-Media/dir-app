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-20 Leaf In The Game Used</text:p>
      <text:p text:style-name="Standard"/>
      <text:p text:style-name="Standard">https://www.sportscardspro.com/console/hockey-cards-2019-leaf-in-the-game-used</text:p>
      <text:p text:style-name="Standard"/>
      <text:p text:style-name="Standard">2019-20 Leaf Lumber Kings</text:p>
      <text:p text:style-name="Standard"/>
      <text:p text:style-name="Standard">https://www.sportscardspro.com/console/hockey-cards-2019-leaf-lumber-kings</text:p>
      <text:p text:style-name="Standard"/>
      <text:p text:style-name="Standard">2019-20 Leaf Superlative Collection</text:p>
      <text:p text:style-name="Standard"/>
      <text:p text:style-name="Standard">https://www.sportscardspro.com/console/hockey-cards-2019-leaf-superlative-collection</text:p>
      <text:p text:style-name="Standard"/>
      <text:p text:style-name="Standard">2019-20 Leaf Ultimate</text:p>
      <text:p text:style-name="Standard"/>
      <text:p text:style-name="Standard">https://www.sportscardspro.com/console/hockey-cards-2019-leaf-ultimate</text:p>
      <text:p text:style-name="Standard"/>
      <text:p text:style-name="Standard">2019-20 O-Pee-Chee</text:p>
      <text:p text:style-name="Standard"/>
      <text:p text:style-name="Standard">https://www.sportscardspro.com/console/hockey-cards-2019-o-pee-chee</text:p>
      <text:p text:style-name="Standard"/>
      <text:p text:style-name="Standard">2019-20 O-Pee-Chee Platinum</text:p>
      <text:p text:style-name="Standard"/>
      <text:p text:style-name="Standard">https://www.sportscardspro.com/console/hockey-cards-2019-o-pee-chee-platinum</text:p>
      <text:p text:style-name="Standard"/>
      <text:p text:style-name="Standard">2019-20 Panini Chronicles</text:p>
      <text:p text:style-name="Standard"/>
      <text:p text:style-name="Standard">https://www.sportscardspro.com/console/hockey-cards-2019-panini-chronicles</text:p>
      <text:p text:style-name="Standard"/>
      <text:p text:style-name="Standard">2019-20 Panini Contenders</text:p>
      <text:p text:style-name="Standard"/>
      <text:p text:style-name="Standard">https://www.sportscardspro.com/console/hockey-cards-2019-panini-contenders</text:p>
      <text:p text:style-name="Standard"/>
      <text:p text:style-name="Standard">2019-20 Panini Immaculate Collection</text:p>
      <text:p text:style-name="Standard"/>
      <text:p text:style-name="Standard">https://www.sportscardspro.com/console/hockey-cards-2019-panini-immaculate-collection</text:p>
      <text:p text:style-name="Standard"/>
      <text:p text:style-name="Standard">2019-20 Panini Obsidian</text:p>
      <text:p text:style-name="Standard"/>
      <text:p text:style-name="Standard">https://www.sportscardspro.com/console/hockey-cards-2019-panini-obsidian</text:p>
      <text:p text:style-name="Standard"/>
      <text:p text:style-name="Standard">2019-20 Panini Prime</text:p>
      <text:p text:style-name="Standard"/>
      <text:p text:style-name="Standard">https://www.sportscardspro.com/console/hockey-cards-2019-panini-prime</text:p>
      <text:p text:style-name="Standard"/>
      <text:p text:style-name="Standard">2019-20 Panini Prizm</text:p>
      <text:p text:style-name="Standard"/>
      <text:p text:style-name="Standard">https://www.sportscardspro.com/console/hockey-cards-2019-panini-prizm</text:p>
      <text:p text:style-name="Standard"/>
      <text:p text:style-name="Standard">2019-20 Panini Select</text:p>
      <text:p text:style-name="Standard"><text:soft-page-break/></text:p>
      <text:p text:style-name="Standard">https://www.sportscardspro.com/console/hockey-cards-2019-panini-select</text:p>
      <text:p text:style-name="Standard"/>
      <text:p text:style-name="Standard">2019-20 Parkhurst</text:p>
      <text:p text:style-name="Standard"/>
      <text:p text:style-name="Standard">https://www.sportscardspro.com/console/hockey-cards-2019-parkhurst</text:p>
      <text:p text:style-name="Standard"/>
      <text:p text:style-name="Standard">2019-20 SP</text:p>
      <text:p text:style-name="Standard"/>
      <text:p text:style-name="Standard">https://www.sportscardspro.com/console/hockey-cards-2019-sp</text:p>
      <text:p text:style-name="Standard"/>
      <text:p text:style-name="Standard">2019-20 SP Authentic</text:p>
      <text:p text:style-name="Standard"/>
      <text:p text:style-name="Standard">https://www.sportscardspro.com/console/hockey-cards-2019-sp-authentic</text:p>
      <text:p text:style-name="Standard"/>
      <text:p text:style-name="Standard">2019-20 SP Game Used</text:p>
      <text:p text:style-name="Standard"/>
      <text:p text:style-name="Standard">https://www.sportscardspro.com/console/hockey-cards-2019-sp-game-used</text:p>
      <text:p text:style-name="Standard"/>
      <text:p text:style-name="Standard">2019-20 SPx</text:p>
      <text:p text:style-name="Standard"/>
      <text:p text:style-name="Standard">https://www.sportscardspro.com/console/hockey-cards-2019-spx</text:p>
      <text:p text:style-name="Standard"/>
      <text:p text:style-name="Standard">2019-20 Upper Deck</text:p>
      <text:p text:style-name="Standard"/>
      <text:p text:style-name="Standard">https://www.sportscardspro.com/console/hockey-cards-2019-upper-deck</text:p>
      <text:p text:style-name="Standard"/>
      <text:p text:style-name="Standard">2019-20 Upper Deck Allure</text:p>
      <text:p text:style-name="Standard"/>
      <text:p text:style-name="Standard">https://www.sportscardspro.com/console/hockey-cards-2019-upper-deck-allure</text:p>
      <text:p text:style-name="Standard"/>
      <text:p text:style-name="Standard">2019-20 Upper Deck Artifacts</text:p>
      <text:p text:style-name="Standard"/>
      <text:p text:style-name="Standard">https://www.sportscardspro.com/console/hockey-cards-2019-upper-deck-artifacts</text:p>
      <text:p text:style-name="Standard"/>
      <text:p text:style-name="Standard">2019-20 Upper Deck Black Diamond</text:p>
      <text:p text:style-name="Standard"/>
      <text:p text:style-name="Standard">https://www.sportscardspro.com/console/hockey-cards-2019-upper-deck-black-diamond</text:p>
      <text:p text:style-name="Standard"/>
      <text:p text:style-name="Standard">2019-20 Upper Deck Buybacks</text:p>
      <text:p text:style-name="Standard"/>
      <text:p text:style-name="Standard">https://www.sportscardspro.com/console/hockey-cards-2019-upper-deck-buybacks</text:p>
      <text:p text:style-name="Standard"/>
      <text:p text:style-name="Standard">2019-20 Upper Deck Chronology</text:p>
      <text:p text:style-name="Standard"/>
      <text:p text:style-name="Standard">https://www.sportscardspro.com/console/hockey-cards-2019-upper-deck-chronology</text:p>
      <text:p text:style-name="Standard"/>
      <text:p text:style-name="Standard">2019-20 Upper Deck Clear Cut</text:p>
      <text:p text:style-name="Standard"/>
      <text:p text:style-name="Standard"><text:soft-page-break/>https://www.sportscardspro.com/console/hockey-cards-2019-upper-deck-clear-cut</text:p>
      <text:p text:style-name="Standard"/>
      <text:p text:style-name="Standard">2019-20 Upper Deck Credentials</text:p>
      <text:p text:style-name="Standard"/>
      <text:p text:style-name="Standard">https://www.sportscardspro.com/console/hockey-cards-2019-upper-deck-credentials</text:p>
      <text:p text:style-name="Standard"/>
      <text:p text:style-name="Standard">2019-20 Upper Deck Engrained</text:p>
      <text:p text:style-name="Standard"/>
      <text:p text:style-name="Standard">https://www.sportscardspro.com/console/hockey-cards-2019-upper-deck-engrained</text:p>
      <text:p text:style-name="Standard"/>
      <text:p text:style-name="Standard">2019-20 Upper Deck Ice</text:p>
      <text:p text:style-name="Standard"/>
      <text:p text:style-name="Standard">https://www.sportscardspro.com/console/hockey-cards-2019-upper-deck-ice</text:p>
      <text:p text:style-name="Standard"/>
      <text:p text:style-name="Standard">2019-20 Upper Deck MVP</text:p>
      <text:p text:style-name="Standard"/>
      <text:p text:style-name="Standard">https://www.sportscardspro.com/console/hockey-cards-2019-upper-deck-mvp</text:p>
      <text:p text:style-name="Standard"/>
      <text:p text:style-name="Standard">2019-20 Upper Deck Premier</text:p>
      <text:p text:style-name="Standard"/>
      <text:p text:style-name="Standard">https://www.sportscardspro.com/console/hockey-cards-2019-upper-deck-premier</text:p>
      <text:p text:style-name="Standard"/>
      <text:p text:style-name="Standard">2019-20 Upper Deck Stature</text:p>
      <text:p text:style-name="Standard"/>
      <text:p text:style-name="Standard">https://www.sportscardspro.com/console/hockey-cards-2019-upper-deck-stature</text:p>
      <text:p text:style-name="Standard"/>
      <text:p text:style-name="Standard">2019-20 Upper Deck Synergy</text:p>
      <text:p text:style-name="Standard"/>
      <text:p text:style-name="Standard">https://www.sportscardspro.com/console/hockey-cards-2019-upper-deck-synergy</text:p>
      <text:p text:style-name="Standard"/>
      <text:p text:style-name="Standard">2019-20 Upper Deck The Cup</text:p>
      <text:p text:style-name="Standard"/>
      <text:p text:style-name="Standard">https://www.sportscardspro.com/console/hockey-cards-2019-upper-deck-the-cup</text:p>
      <text:p text:style-name="Standard"/>
      <text:p text:style-name="Standard">2019-20 Upper Deck Trilogy</text:p>
      <text:p text:style-name="Standard"/>
      <text:p text:style-name="Standard">https://www.sportscardspro.com/console/hockey-cards-2019-upper-deck-trilogy</text:p>
      <text:p text:style-name="Standard"/>
      <text:p text:style-name="Standard">2019-20 Upper Deck Ultimate Collection</text:p>
      <text:p text:style-name="Standard"/>
      <text:p text:style-name="Standard">https://www.sportscardspro.com/console/hockey-cards-2019-upper-deck-ultimate-col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00:04</meta:creation-date>
    <meta:document-statistic meta:table-count="0" meta:image-count="0" meta:object-count="0" meta:page-count="3" meta:paragraph-count="70" meta:word-count="163" meta:character-count="3435"/>
    <dc:date>2026-06-21T13:00:52</dc:date>
    <dc:creator>zach seabolt</dc:creator>
    <meta:editing-duration>PT48S</meta:editing-duration>
    <meta:editing-cycles>1</meta:editing-cycles>
    <meta:generator>OpenOffice/4.1.11$Unix OpenOffice.org_project/4111m1$Build-9808</meta:generator>
  </office:meta>
</office:document-meta>
</file>