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-BoldMT" svg:font-family="Arial-Bold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4 Donruss</text:p>
      <text:p text:style-name="Standard">https://www.sportscardspro.com/console/basketball-cards-2024-donruss</text:p>
      <text:p text:style-name="Standard"/>
      <text:p text:style-name="Standard">2024 Donruss Optic</text:p>
      <text:p text:style-name="Standard">https://www.sportscardspro.com/console/basketball-cards-2024-donruss-optic</text:p>
      <text:p text:style-name="Standard"/>
      <text:p text:style-name="Standard">2024 Finest</text:p>
      <text:p text:style-name="Standard">https://www.sportscardspro.com/console/basketball-cards-2024-finest</text:p>
      <text:p text:style-name="Standard"/>
      <text:p text:style-name="Standard">2024 Hoops</text:p>
      <text:p text:style-name="Standard">https://www.sportscardspro.com/console/basketball-cards-2024-hoops</text:p>
      <text:p text:style-name="Standard"/>
      <text:p text:style-name="Standard">2024 Hoops Haunted Hoops</text:p>
      <text:p text:style-name="Standard">https://www.sportscardspro.com/console/basketball-cards-2024-hoops-haunted-hoops</text:p>
      <text:p text:style-name="Standard"/>
      <text:p text:style-name="Standard">2024 Hoops Winter</text:p>
      <text:p text:style-name="Standard">https://www.sportscardspro.com/console/basketball-cards-2024-hoops-winter</text:p>
      <text:p text:style-name="Standard"/>
      <text:p text:style-name="Standard">2024 Panini Court Kings</text:p>
      <text:p text:style-name="Standard">https://www.sportscardspro.com/console/basketball-cards-2024-panini-court-kings</text:p>
      <text:p text:style-name="Standard"/>
      <text:p text:style-name="Standard">2024 Panini Eminence</text:p>
      <text:p text:style-name="Standard">https://www.sportscardspro.com/console/basketball-cards-2024-panini-eminence</text:p>
      <text:p text:style-name="Standard"/>
      <text:p text:style-name="Standard">2024 Panini Flawless</text:p>
      <text:p text:style-name="Standard">https://www.sportscardspro.com/console/basketball-cards-2024-panini-flawless</text:p>
      <text:p text:style-name="Standard"/>
      <text:p text:style-name="Standard">2024 Panini Immaculate Collection</text:p>
      <text:p text:style-name="Standard">https://www.sportscardspro.com/console/basketball-cards-2024-panini-immaculate-collection</text:p>
      <text:p text:style-name="Standard"/>
      <text:p text:style-name="Standard">2024 Panini Mosaic</text:p>
      <text:p text:style-name="Standard">https://www.sportscardspro.com/console/basketball-cards-2024-panini-mosaic</text:p>
      <text:p text:style-name="Standard"/>
      <text:p text:style-name="Standard">2024 Panini National Treasures</text:p>
      <text:p text:style-name="Standard">https://www.sportscardspro.com/console/basketball-cards-2024-panini-national-treasures</text:p>
      <text:p text:style-name="Standard"/>
      <text:p text:style-name="Standard">2024 Panini Noir</text:p>
      <text:p text:style-name="Standard">https://www.sportscardspro.com/console/basketball-cards-2024-panini-noir</text:p>
      <text:p text:style-name="Standard"/>
      <text:p text:style-name="Standard">2024 Panini Obsidian</text:p>
      <text:p text:style-name="Standard">https://www.sportscardspro.com/console/basketball-cards-2024-panini-obsidian</text:p>
      <text:p text:style-name="Standard"/>
      <text:p text:style-name="Standard">2024 Panini One and One</text:p>
      <text:p text:style-name="Standard">https://www.sportscardspro.com/console/basketball-cards-2024-panini-one-and-one</text:p>
      <text:p text:style-name="Standard"/>
      <text:p text:style-name="Standard">2024 Panini Origins</text:p>
      <text:p text:style-name="Standard">https://www.sportscardspro.com/console/basketball-cards-2024-panini-origins</text:p>
      <text:p text:style-name="Standard"/>
      <text:p text:style-name="Standard">2024 Panini Photogenic</text:p>
      <text:p text:style-name="Standard"><text:soft-page-break/>https://www.sportscardspro.com/console/basketball-cards-2024-panini-photogenic</text:p>
      <text:p text:style-name="Standard"/>
      <text:p text:style-name="Standard">2024 Panini Prizm</text:p>
      <text:p text:style-name="Standard">https://www.sportscardspro.com/console/basketball-cards-2024-panini-prizm</text:p>
      <text:p text:style-name="Standard"/>
      <text:p text:style-name="Standard">2024 Panini Prizm Black</text:p>
      <text:p text:style-name="Standard">https://www.sportscardspro.com/console/basketball-cards-2024-panini-prizm-black</text:p>
      <text:p text:style-name="Standard"/>
      <text:p text:style-name="Standard">2024 Panini Prizm Deca</text:p>
      <text:p text:style-name="Standard">https://www.sportscardspro.com/console/basketball-cards-2024-panini-prizm-deca</text:p>
      <text:p text:style-name="Standard"/>
      <text:p text:style-name="Standard">2024 Panini Prizm Monopoly</text:p>
      <text:p text:style-name="Standard">https://www.sportscardspro.com/console/basketball-cards-2024-panini-prizm-monopoly</text:p>
      <text:p text:style-name="Standard"/>
      <text:p text:style-name="Standard">2024 Panini Revolution</text:p>
      <text:p text:style-name="Standard">https://www.sportscardspro.com/console/basketball-cards-2024-panini-revolution</text:p>
      <text:p text:style-name="Standard"/>
      <text:p text:style-name="Standard">2024 Panini Select</text:p>
      <text:p text:style-name="Standard">https://www.sportscardspro.com/console/basketball-cards-2024-panini-select</text:p>
      <text:p text:style-name="Standard"/>
      <text:p text:style-name="Standard">2024 Panini Silhouette</text:p>
      <text:p text:style-name="Standard">https://www.sportscardspro.com/console/basketball-cards-2024-panini-silhouette</text:p>
      <text:p text:style-name="Standard"/>
      <text:p text:style-name="Standard">2024 Panini Totally Certified</text:p>
      <text:p text:style-name="Standard">https://www.sportscardspro.com/console/basketball-cards-2024-panini-totally-certified</text:p>
      <text:p text:style-name="Standard"/>
      <text:p text:style-name="Standard">2024 Topps Chrome</text:p>
      <text:p text:style-name="Standard">https://www.sportscardspro.com/console/basketball-cards-2024-topps-chrome</text:p>
      <text:p text:style-name="Standard"/>
      <text:p text:style-name="Standard">2024 Topps Chrome Sapphire Edition</text:p>
      <text:p text:style-name="Standard">https://www.sportscardspro.com/console/basketball-cards-2024-topps-chrome-sapphire-edition</text:p>
      <text:p text:style-name="Standard"/>
      <text:p text:style-name="Standard">2024 Topps Inception</text:p>
      <text:p text:style-name="Standard">https://www.sportscardspro.com/console/basketball-cards-2024-topps-ince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Arial-BoldMT" svg:font-family="Arial-Bold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5:45:20</meta:creation-date>
    <meta:generator>OpenOffice/4.1.11$Unix OpenOffice.org_project/4111m1$Build-9808</meta:generator>
    <meta:document-statistic meta:table-count="0" meta:image-count="0" meta:object-count="0" meta:page-count="2" meta:paragraph-count="56" meta:word-count="121" meta:character-count="2740"/>
    <dc:date>2026-06-21T15:47:45</dc:date>
    <dc:creator>zach seabolt</dc:creator>
    <meta:editing-duration>PT2M25S</meta:editing-duration>
    <meta:editing-cycles>1</meta:editing-cycles>
  </office:meta>
</office:document-meta>
</file>