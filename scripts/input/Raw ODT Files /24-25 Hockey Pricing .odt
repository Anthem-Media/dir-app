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4-25 Fleer Ultra</text:p>
      <text:p text:style-name="Standard"/>
      <text:p text:style-name="Standard">https://www.sportscardspro.com/console/hockey-cards-2024-fleer-ultra</text:p>
      <text:p text:style-name="Standard"/>
      <text:p text:style-name="Standard">2024-25 O-Pee-Chee</text:p>
      <text:p text:style-name="Standard"/>
      <text:p text:style-name="Standard">https://www.sportscardspro.com/console/hockey-cards-2024-o-pee-chee</text:p>
      <text:p text:style-name="Standard"/>
      <text:p text:style-name="Standard">2024-25 O-Pee-Chee Platinum</text:p>
      <text:p text:style-name="Standard"/>
      <text:p text:style-name="Standard">https://www.sportscardspro.com/console/hockey-cards-2024-o-pee-chee-platinum</text:p>
      <text:p text:style-name="Standard"/>
      <text:p text:style-name="Standard">2024-25 Parkhurst Champions</text:p>
      <text:p text:style-name="Standard"/>
      <text:p text:style-name="Standard">https://www.sportscardspro.com/console/hockey-cards-2024-parkhurst-champions</text:p>
      <text:p text:style-name="Standard"/>
      <text:p text:style-name="Standard">2024-25 SkyBox Metal Universe</text:p>
      <text:p text:style-name="Standard"/>
      <text:p text:style-name="Standard">https://www.sportscardspro.com/console/hockey-cards-2024-skybox-metal-universe</text:p>
      <text:p text:style-name="Standard"/>
      <text:p text:style-name="Standard">2024-25 SP</text:p>
      <text:p text:style-name="Standard"/>
      <text:p text:style-name="Standard">https://www.sportscardspro.com/console/hockey-cards-2024-sp</text:p>
      <text:p text:style-name="Standard"/>
      <text:p text:style-name="Standard">2024-25 SP Authentic</text:p>
      <text:p text:style-name="Standard"/>
      <text:p text:style-name="Standard">https://www.sportscardspro.com/console/hockey-cards-2024-sp-authentic</text:p>
      <text:p text:style-name="Standard"/>
      <text:p text:style-name="Standard">2024-25 SP Game Used</text:p>
      <text:p text:style-name="Standard"/>
      <text:p text:style-name="Standard">https://www.sportscardspro.com/console/hockey-cards-2024-sp-game-used</text:p>
      <text:p text:style-name="Standard"/>
      <text:p text:style-name="Standard">2024-25 SPx</text:p>
      <text:p text:style-name="Standard"/>
      <text:p text:style-name="Standard">https://www.sportscardspro.com/console/hockey-cards-2024-spx</text:p>
      <text:p text:style-name="Standard"/>
      <text:p text:style-name="Standard">2024-25 Upper Deck</text:p>
      <text:p text:style-name="Standard"/>
      <text:p text:style-name="Standard">https://www.sportscardspro.com/console/hockey-cards-2024-upper-deck</text:p>
      <text:p text:style-name="Standard"/>
      <text:p text:style-name="Standard">2024-25 Upper Deck Allure</text:p>
      <text:p text:style-name="Standard"/>
      <text:p text:style-name="Standard">https://www.sportscardspro.com/console/hockey-cards-2024-upper-deck-allure</text:p>
      <text:p text:style-name="Standard"/>
      <text:p text:style-name="Standard">2024-25 Upper Deck Artifacts</text:p>
      <text:p text:style-name="Standard"/>
      <text:p text:style-name="Standard">https://www.sportscardspro.com/console/hockey-cards-2024-upper-deck-artifacts</text:p>
      <text:p text:style-name="Standard"/>
      <text:p text:style-name="Standard">2024-25 Upper Deck Black Diamond</text:p>
      <text:p text:style-name="Standard"><text:soft-page-break/></text:p>
      <text:p text:style-name="Standard">https://www.sportscardspro.com/console/hockey-cards-2024-upper-deck-black-diamond</text:p>
      <text:p text:style-name="Standard"/>
      <text:p text:style-name="Standard">2024-25 Upper Deck Clear Cut</text:p>
      <text:p text:style-name="Standard"/>
      <text:p text:style-name="Standard">https://www.sportscardspro.com/console/hockey-cards-2024-upper-deck-clear-cut</text:p>
      <text:p text:style-name="Standard"/>
      <text:p text:style-name="Standard">2024-25 Upper Deck Credentials</text:p>
      <text:p text:style-name="Standard"/>
      <text:p text:style-name="Standard">https://www.sportscardspro.com/console/hockey-cards-2024-upper-deck-credentials</text:p>
      <text:p text:style-name="Standard"/>
      <text:p text:style-name="Standard">2024-25 Upper Deck Engrained Icons</text:p>
      <text:p text:style-name="Standard"/>
      <text:p text:style-name="Standard">https://www.sportscardspro.com/console/hockey-cards-2024-upper-deck-engrained-icons</text:p>
      <text:p text:style-name="Standard"/>
      <text:p text:style-name="Standard">2024-25 Upper Deck Ice</text:p>
      <text:p text:style-name="Standard"/>
      <text:p text:style-name="Standard">https://www.sportscardspro.com/console/hockey-cards-2024-upper-deck-ice</text:p>
      <text:p text:style-name="Standard"/>
      <text:p text:style-name="Standard">2024-25 Upper Deck MVP</text:p>
      <text:p text:style-name="Standard"/>
      <text:p text:style-name="Standard">https://www.sportscardspro.com/console/hockey-cards-2024-upper-deck-mvp</text:p>
      <text:p text:style-name="Standard"/>
      <text:p text:style-name="Standard">2024-25 Upper Deck Premier</text:p>
      <text:p text:style-name="Standard"/>
      <text:p text:style-name="Standard">https://www.sportscardspro.com/console/hockey-cards-2024-upper-deck-premier</text:p>
      <text:p text:style-name="Standard"/>
      <text:p text:style-name="Standard">2024-25 Upper Deck Stature</text:p>
      <text:p text:style-name="Standard"/>
      <text:p text:style-name="Standard">https://www.sportscardspro.com/console/hockey-cards-2024-upper-deck-stature</text:p>
      <text:p text:style-name="Standard"/>
      <text:p text:style-name="Standard">2024-25 Upper Deck Synergy</text:p>
      <text:p text:style-name="Standard"/>
      <text:p text:style-name="Standard">https://www.sportscardspro.com/console/hockey-cards-2024-upper-deck-synergy</text:p>
      <text:p text:style-name="Standard"/>
      <text:p text:style-name="Standard">2024-25 Upper Deck The Cup</text:p>
      <text:p text:style-name="Standard"/>
      <text:p text:style-name="Standard">https://www.sportscardspro.com/console/hockey-cards-2024-upper-deck-the-cup</text:p>
      <text:p text:style-name="Standard"/>
      <text:p text:style-name="Standard">2024-25 Upper Deck Ultimate Collection</text:p>
      <text:p text:style-name="Standard"/>
      <text:p text:style-name="Standard"><text:a xlink:type="simple" xlink:href="https://www.sportscardspro.com/console/hockey-cards-2024-upper-deck-ultimate-collection" text:style-name="Internet_20_link" text:visited-style-name="Visited_20_Internet_20_Link">https://www.sportscardspro.com/console/hockey-cards-2024-upper-deck-ultimate-collection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03:28</meta:creation-date>
    <dc:date>2026-06-21T13:05:04</dc:date>
    <dc:creator>zach seabolt</dc:creator>
    <meta:editing-duration>PT1M36S</meta:editing-duration>
    <meta:editing-cycles>2</meta:editing-cycles>
    <meta:generator>OpenOffice/4.1.11$Unix OpenOffice.org_project/4111m1$Build-9808</meta:generator>
    <meta:document-statistic meta:table-count="0" meta:image-count="0" meta:object-count="0" meta:page-count="2" meta:paragraph-count="46" meta:word-count="109" meta:character-count="2252"/>
  </office:meta>
</office:document-meta>
</file>