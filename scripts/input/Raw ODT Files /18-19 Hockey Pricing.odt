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8-19 Leaf Ultimate</text:p>
      <text:p text:style-name="P1">https://www.sportscardspro.com/console/hockey-cards-2018-leaf-ultimate</text:p>
      <text:p text:style-name="P1">2018-19 O-Pee-Chee</text:p>
      <text:p text:style-name="P1">https://www.sportscardspro.com/console/hockey-cards-2018-o-pee-chee</text:p>
      <text:p text:style-name="P1">2018-19 O-Pee-Chee Platinum</text:p>
      <text:p text:style-name="P1">https://www.sportscardspro.com/console/hockey-cards-2018-o-pee-chee-platinum</text:p>
      <text:p text:style-name="P1">2018-19 Parkhurst</text:p>
      <text:p text:style-name="P1">https://www.sportscardspro.com/console/hockey-cards-2018-parkhurst</text:p>
      <text:p text:style-name="P1">2018-19 SP</text:p>
      <text:p text:style-name="P1">https://www.sportscardspro.com/console/hockey-cards-2018-sp</text:p>
      <text:p text:style-name="P1">2018-19 SP Authentic</text:p>
      <text:p text:style-name="P1">https://www.sportscardspro.com/console/hockey-cards-2018-sp-authentic</text:p>
      <text:p text:style-name="P1">2018-19 SP Game Used</text:p>
      <text:p text:style-name="P1">https://www.sportscardspro.com/console/hockey-cards-2018-sp-game-used</text:p>
      <text:p text:style-name="P1">2018-19 SPx</text:p>
      <text:p text:style-name="P1">https://www.sportscardspro.com/console/hockey-cards-2018-spx</text:p>
      <text:p text:style-name="P1">2018-19 Upper Deck</text:p>
      <text:p text:style-name="P1">https://www.sportscardspro.com/console/hockey-cards-2018-upper-deck</text:p>
      <text:p text:style-name="P1">2018-19 Upper Deck Artifacts</text:p>
      <text:p text:style-name="P1">https://www.sportscardspro.com/console/hockey-cards-2018-upper-deck-artifacts</text:p>
      <text:p text:style-name="P1">2018-19 Upper Deck Black Diamond</text:p>
      <text:p text:style-name="P1">https://www.sportscardspro.com/console/hockey-cards-2018-upper-deck-black-diamond</text:p>
      <text:p text:style-name="P1">2018-19 Upper Deck Chronology</text:p>
      <text:p text:style-name="P1">https://www.sportscardspro.com/console/hockey-cards-2018-upper-deck-chronology</text:p>
      <text:p text:style-name="P1">2018-19 Upper Deck Clear Cut</text:p>
      <text:p text:style-name="P1">https://www.sportscardspro.com/console/hockey-cards-2018-upper-deck-clear-cut</text:p>
      <text:p text:style-name="P1">2018-19 Upper Deck Engrained</text:p>
      <text:p text:style-name="P1">https://www.sportscardspro.com/console/hockey-cards-2018-upper-deck-engrained</text:p>
      <text:p text:style-name="P1">2018-19 Upper Deck Ice</text:p>
      <text:p text:style-name="P1">https://www.sportscardspro.com/console/hockey-cards-2018-upper-deck-ice</text:p>
      <text:p text:style-name="P1">2018-19 Upper Deck MVP</text:p>
      <text:p text:style-name="P1">https://www.sportscardspro.com/console/hockey-cards-2018-upper-deck-mvp</text:p>
      <text:p text:style-name="P1">2018-19 Upper Deck Premier</text:p>
      <text:p text:style-name="P1">https://www.sportscardspro.com/console/hockey-cards-2018-upper-deck-premier</text:p>
      <text:p text:style-name="P1"><text:soft-page-break/>2018-19 Upper Deck Synergy</text:p>
      <text:p text:style-name="P1">https://www.sportscardspro.com/console/hockey-cards-2018-upper-deck-synergy</text:p>
      <text:p text:style-name="P1">2018-19 Upper Deck The Cup</text:p>
      <text:p text:style-name="P1">https://www.sportscardspro.com/console/hockey-cards-2018-upper-deck-the-cup</text:p>
      <text:p text:style-name="P1">2018-19 Upper Deck Trilogy</text:p>
      <text:p text:style-name="P1">https://www.sportscardspro.com/console/hockey-cards-2018-upper-deck-trilogy</text:p>
      <text:p text:style-name="P1">2018-19 Upper Deck Ultimate Collection</text:p>
      <text:p text:style-name="P1">https://www.sportscardspro.com/console/hockey-cards-2018-upper-deck-ultimate-collecti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RTF_5f_Num_20_2_20_1" style:display-name="RTF_Num 2 1" style:family="text"/>
    <style:style style:name="RTF_5f_Num_20_3_20_1" style:display-name="RTF_Num 3 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text:style-name="RTF_5f_Num_20_3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 seabolt</meta:initial-creator>
    <meta:creation-date>2026-06-21T12:52:38</meta:creation-date>
    <meta:document-statistic meta:table-count="0" meta:image-count="0" meta:object-count="0" meta:page-count="2" meta:paragraph-count="42" meta:word-count="97" meta:character-count="2015"/>
    <dc:date>2026-06-21T12:54:22</dc:date>
    <dc:creator>zach seabolt</dc:creator>
    <meta:editing-duration>PT1M44S</meta:editing-duration>
    <meta:editing-cycles>1</meta:editing-cycles>
    <meta:generator>OpenOffice/4.1.11$Unix OpenOffice.org_project/4111m1$Build-9808</meta:generator>
  </office:meta>
</office:document-meta>
</file>