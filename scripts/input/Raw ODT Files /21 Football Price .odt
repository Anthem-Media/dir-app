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1 Clearly Donruss</text:p>
      <text:p text:style-name="Standard"/>
      <text:p text:style-name="Standard">https://www.sportscardspro.com/console/football-cards-2021-clearly-donruss</text:p>
      <text:p text:style-name="Standard"/>
      <text:p text:style-name="Standard">2021 Donruss</text:p>
      <text:p text:style-name="Standard"/>
      <text:p text:style-name="Standard">https://www.sportscardspro.com/console/football-cards-2021-donruss</text:p>
      <text:p text:style-name="Standard"/>
      <text:p text:style-name="Standard">2021 Donruss Elite</text:p>
      <text:p text:style-name="Standard"/>
      <text:p text:style-name="Standard">https://www.sportscardspro.com/console/football-cards-2021-donruss-elite</text:p>
      <text:p text:style-name="Standard"/>
      <text:p text:style-name="Standard">2021 Donruss Optic</text:p>
      <text:p text:style-name="Standard"/>
      <text:p text:style-name="Standard">https://www.sportscardspro.com/console/football-cards-2021-donruss-optic</text:p>
      <text:p text:style-name="Standard"/>
      <text:p text:style-name="Standard">2021 Panini Absolute</text:p>
      <text:p text:style-name="Standard"/>
      <text:p text:style-name="Standard">https://www.sportscardspro.com/console/football-cards-2021-panini-absolute</text:p>
      <text:p text:style-name="Standard"/>
      <text:p text:style-name="Standard">2021 Panini Black</text:p>
      <text:p text:style-name="Standard"/>
      <text:p text:style-name="Standard">https://www.sportscardspro.com/console/football-cards-2021-panini-black</text:p>
      <text:p text:style-name="Standard"/>
      <text:p text:style-name="Standard">2021 Panini Certified</text:p>
      <text:p text:style-name="Standard"/>
      <text:p text:style-name="Standard">https://www.sportscardspro.com/console/football-cards-2021-panini-certified</text:p>
      <text:p text:style-name="Standard"/>
      <text:p text:style-name="Standard">2021 Panini Chronicles</text:p>
      <text:p text:style-name="Standard"/>
      <text:p text:style-name="Standard">https://www.sportscardspro.com/console/football-cards-2021-panini-chronicles</text:p>
      <text:p text:style-name="Standard"/>
      <text:p text:style-name="Standard">2021 Panini Classics</text:p>
      <text:p text:style-name="Standard"/>
      <text:p text:style-name="Standard">https://www.sportscardspro.com/console/football-cards-2021-panini-classics</text:p>
      <text:p text:style-name="Standard"/>
      <text:p text:style-name="Standard">2021 Panini Contenders</text:p>
      <text:p text:style-name="Standard"/>
      <text:p text:style-name="Standard">https://www.sportscardspro.com/console/football-cards-2021-panini-contenders</text:p>
      <text:p text:style-name="Standard"/>
      <text:p text:style-name="Standard">2021 Panini Contenders Optic</text:p>
      <text:p text:style-name="Standard"/>
      <text:p text:style-name="Standard">https://www.sportscardspro.com/console/football-cards-2021-panini-contenders-optic</text:p>
      <text:p text:style-name="Standard"/>
      <text:p text:style-name="Standard">2021 Panini Elements</text:p>
      <text:p text:style-name="Standard"/>
      <text:p text:style-name="Standard">https://www.sportscardspro.com/console/football-cards-2021-panini-elements</text:p>
      <text:p text:style-name="Standard"/>
      <text:p text:style-name="Standard">2021 Panini Eminence</text:p>
      <text:p text:style-name="Standard"><text:soft-page-break/></text:p>
      <text:p text:style-name="Standard">https://www.sportscardspro.com/console/football-cards-2021-panini-eminence</text:p>
      <text:p text:style-name="Standard"/>
      <text:p text:style-name="Standard">2021 Panini Encased</text:p>
      <text:p text:style-name="Standard"/>
      <text:p text:style-name="Standard">https://www.sportscardspro.com/console/football-cards-2021-panini-encased</text:p>
      <text:p text:style-name="Standard"/>
      <text:p text:style-name="Standard">2021 Panini Flawless</text:p>
      <text:p text:style-name="Standard"/>
      <text:p text:style-name="Standard">https://www.sportscardspro.com/console/football-cards-2021-panini-flawless</text:p>
      <text:p text:style-name="Standard"/>
      <text:p text:style-name="Standard">2021 Panini Gold Standard</text:p>
      <text:p text:style-name="Standard"/>
      <text:p text:style-name="Standard">https://www.sportscardspro.com/console/football-cards-2021-panini-gold-standard</text:p>
      <text:p text:style-name="Standard"/>
      <text:p text:style-name="Standard">2021 Panini Illusions</text:p>
      <text:p text:style-name="Standard"/>
      <text:p text:style-name="Standard">https://www.sportscardspro.com/console/football-cards-2021-panini-illusions</text:p>
      <text:p text:style-name="Standard"/>
      <text:p text:style-name="Standard">2021 Panini Immaculate Collection</text:p>
      <text:p text:style-name="Standard"/>
      <text:p text:style-name="Standard">https://www.sportscardspro.com/console/football-cards-2021-panini-immaculate-collection</text:p>
      <text:p text:style-name="Standard"/>
      <text:p text:style-name="Standard">2021 Panini Impeccable</text:p>
      <text:p text:style-name="Standard"/>
      <text:p text:style-name="Standard">https://www.sportscardspro.com/console/football-cards-2021-panini-impeccable</text:p>
      <text:p text:style-name="Standard"/>
      <text:p text:style-name="Standard">2021 Panini Legacy</text:p>
      <text:p text:style-name="Standard"/>
      <text:p text:style-name="Standard">https://www.sportscardspro.com/console/football-cards-2021-panini-legacy</text:p>
      <text:p text:style-name="Standard"/>
      <text:p text:style-name="Standard">2021 Panini Limited</text:p>
      <text:p text:style-name="Standard"/>
      <text:p text:style-name="Standard">https://www.sportscardspro.com/console/football-cards-2021-panini-limited</text:p>
      <text:p text:style-name="Standard"/>
      <text:p text:style-name="Standard">2021 Panini Luminance</text:p>
      <text:p text:style-name="Standard"/>
      <text:p text:style-name="Standard">https://www.sportscardspro.com/console/football-cards-2021-panini-luminance</text:p>
      <text:p text:style-name="Standard"/>
      <text:p text:style-name="Standard">2021 Panini Mosaic</text:p>
      <text:p text:style-name="Standard"/>
      <text:p text:style-name="Standard">https://www.sportscardspro.com/console/football-cards-2021-panini-mosaic</text:p>
      <text:p text:style-name="Standard"/>
      <text:p text:style-name="Standard">2021 Panini National Treasures</text:p>
      <text:p text:style-name="Standard"/>
      <text:p text:style-name="Standard">https://www.sportscardspro.com/console/football-cards-2021-panini-national-treasures</text:p>
      <text:p text:style-name="Standard"/>
      <text:p text:style-name="Standard">2021 Panini Obsidian</text:p>
      <text:p text:style-name="Standard"/>
      <text:p text:style-name="Standard"><text:soft-page-break/>https://www.sportscardspro.com/console/football-cards-2021-panini-obsidian</text:p>
      <text:p text:style-name="Standard"/>
      <text:p text:style-name="Standard">2021 Panini One</text:p>
      <text:p text:style-name="Standard"/>
      <text:p text:style-name="Standard">https://www.sportscardspro.com/console/football-cards-2021-panini-one</text:p>
      <text:p text:style-name="Standard"/>
      <text:p text:style-name="Standard">2021 Panini Origins</text:p>
      <text:p text:style-name="Standard"/>
      <text:p text:style-name="Standard">https://www.sportscardspro.com/console/football-cards-2021-panini-origins</text:p>
      <text:p text:style-name="Standard"/>
      <text:p text:style-name="Standard">2021 Panini Phoenix</text:p>
      <text:p text:style-name="Standard"/>
      <text:p text:style-name="Standard">https://www.sportscardspro.com/console/football-cards-2021-panini-phoenix</text:p>
      <text:p text:style-name="Standard"/>
      <text:p text:style-name="Standard">2021 Panini Playbook</text:p>
      <text:p text:style-name="Standard"/>
      <text:p text:style-name="Standard">https://www.sportscardspro.com/console/football-cards-2021-panini-playbook</text:p>
      <text:p text:style-name="Standard"/>
      <text:p text:style-name="Standard">2021 Panini Playoff</text:p>
      <text:p text:style-name="Standard"/>
      <text:p text:style-name="Standard">https://www.sportscardspro.com/console/football-cards-2021-panini-playoff</text:p>
      <text:p text:style-name="Standard"/>
      <text:p text:style-name="Standard">2021 Panini Prestige</text:p>
      <text:p text:style-name="Standard"/>
      <text:p text:style-name="Standard">https://www.sportscardspro.com/console/football-cards-2021-panini-prestige</text:p>
      <text:p text:style-name="Standard"/>
      <text:p text:style-name="Standard">2021 Panini Prizm</text:p>
      <text:p text:style-name="Standard"/>
      <text:p text:style-name="Standard">https://www.sportscardspro.com/console/football-cards-2021-panini-prizm</text:p>
      <text:p text:style-name="Standard"/>
      <text:p text:style-name="Standard">2021 Panini Rookies &amp; Stars</text:p>
      <text:p text:style-name="Standard"/>
      <text:p text:style-name="Standard">https://www.sportscardspro.com/console/football-cards-2021-panini-rookies-and-stars</text:p>
      <text:p text:style-name="Standard"/>
      <text:p text:style-name="Standard">2021 Panini Select</text:p>
      <text:p text:style-name="Standard"/>
      <text:p text:style-name="Standard">https://www.sportscardspro.com/console/football-cards-2021-panini-select</text:p>
      <text:p text:style-name="Standard"/>
      <text:p text:style-name="Standard">2021 Panini Spectra</text:p>
      <text:p text:style-name="Standard"/>
      <text:p text:style-name="Standard">https://www.sportscardspro.com/console/football-cards-2021-panini-spectra</text:p>
      <text:p text:style-name="Standard"/>
      <text:p text:style-name="Standard">2021 Panini XR</text:p>
      <text:p text:style-name="Standard"/>
      <text:p text:style-name="Standard">https://www.sportscardspro.com/console/football-cards-2021-panini-xr</text:p>
      <text:p text:style-name="Standard"/>
      <text:p text:style-name="Standard">2021 Pro Set Metal</text:p>
      <text:p text:style-name="Standard"/>
      <text:p text:style-name="Standard">https://www.sportscardspro.com/console/football-cards-2021-pro-set-metal</text:p>
      <text:p text:style-name="Standard"><text:soft-page-break/></text:p>
      <text:p text:style-name="Standard">2021 Pro Set Power</text:p>
      <text:p text:style-name="Standard"/>
      <text:p text:style-name="Standard">https://www.sportscardspro.com/console/football-cards-2021-pro-set-power</text:p>
      <text:p text:style-name="Standard"/>
      <text:p text:style-name="Standard">2021 Score</text:p>
      <text:p text:style-name="Standard"/>
      <text:p text:style-name="Standard">https://www.sportscardspro.com/console/football-cards-2021-score</text:p>
      <text:p text:style-name="Standard"/>
      <text:p text:style-name="Standard">2021 Zenith</text:p>
      <text:p text:style-name="Standard"/>
      <text:p text:style-name="Standard">https://www.sportscardspro.com/console/football-cards-2021-zeni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28:16</meta:creation-date>
    <meta:document-statistic meta:table-count="0" meta:image-count="0" meta:object-count="0" meta:page-count="4" meta:paragraph-count="80" meta:word-count="165" meta:character-count="3738"/>
    <dc:date>2026-06-21T13:28:26</dc:date>
    <dc:creator>zach seabolt</dc:creator>
    <meta:editing-duration>PT11S</meta:editing-duration>
    <meta:editing-cycles>1</meta:editing-cycles>
    <meta:generator>OpenOffice/4.1.11$Unix OpenOffice.org_project/4111m1$Build-9808</meta:generator>
  </office:meta>
</office:document-meta>
</file>