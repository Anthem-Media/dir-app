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9 Clearly Donruss</text:p>
      <text:p text:style-name="Standard">https://www.sportscardspro.com/console/basketball-cards-2019-clearly-donruss</text:p>
      <text:p text:style-name="Standard"/>
      <text:p text:style-name="Standard">2019 Donruss</text:p>
      <text:p text:style-name="Standard">https://www.sportscardspro.com/console/basketball-cards-2019-donruss</text:p>
      <text:p text:style-name="Standard"/>
      <text:p text:style-name="Standard">2019 Donruss Elite</text:p>
      <text:p text:style-name="Standard">https://www.sportscardspro.com/console/basketball-cards-2019-donruss-elite</text:p>
      <text:p text:style-name="Standard"/>
      <text:p text:style-name="Standard">2019 Donruss Optic</text:p>
      <text:p text:style-name="Standard">https://www.sportscardspro.com/console/basketball-cards-2019-donruss-optic</text:p>
      <text:p text:style-name="Standard"/>
      <text:p text:style-name="Standard">2019 Hoops</text:p>
      <text:p text:style-name="Standard">https://www.sportscardspro.com/console/basketball-cards-2019-hoops</text:p>
      <text:p text:style-name="Standard"/>
      <text:p text:style-name="Standard">2019 Hoops Premium Stock</text:p>
      <text:p text:style-name="Standard">https://www.sportscardspro.com/console/basketball-cards-2019-hoops-premium-stock</text:p>
      <text:p text:style-name="Standard"/>
      <text:p text:style-name="Standard">2019 Hoops Winter</text:p>
      <text:p text:style-name="Standard">https://www.sportscardspro.com/console/basketball-cards-2019-hoops-winter</text:p>
      <text:p text:style-name="Standard"/>
      <text:p text:style-name="Standard">2019 Panini Absolute Memorabilia</text:p>
      <text:p text:style-name="Standard">https://www.sportscardspro.com/console/basketball-cards-2019-panini-absolute-memorabilia</text:p>
      <text:p text:style-name="Standard"/>
      <text:p text:style-name="Standard">2019 Panini Black</text:p>
      <text:p text:style-name="Standard">https://www.sportscardspro.com/console/basketball-cards-2019-panini-black</text:p>
      <text:p text:style-name="Standard"/>
      <text:p text:style-name="Standard">2019 Panini Certified</text:p>
      <text:p text:style-name="Standard">https://www.sportscardspro.com/console/basketball-cards-2019-panini-certified</text:p>
      <text:p text:style-name="Standard"/>
      <text:p text:style-name="Standard">2019 Panini Chronicles</text:p>
      <text:p text:style-name="Standard">https://www.sportscardspro.com/console/basketball-cards-2019-panini-chronicles</text:p>
      <text:p text:style-name="Standard"/>
      <text:p text:style-name="Standard">2019 Panini Contenders</text:p>
      <text:p text:style-name="Standard">https://www.sportscardspro.com/console/basketball-cards-2019-panini-contenders</text:p>
      <text:p text:style-name="Standard"/>
      <text:p text:style-name="Standard">2019 Panini Contenders Optic</text:p>
      <text:p text:style-name="Standard">https://www.sportscardspro.com/console/basketball-cards-2019-panini-contenders-optic</text:p>
      <text:p text:style-name="Standard"/>
      <text:p text:style-name="Standard">2019 Panini Court Kings</text:p>
      <text:p text:style-name="Standard">https://www.sportscardspro.com/console/basketball-cards-2019-panini-court-kings</text:p>
      <text:p text:style-name="Standard"/>
      <text:p text:style-name="Standard">2019 Panini Crown Royale</text:p>
      <text:p text:style-name="Standard">https://www.sportscardspro.com/console/basketball-cards-2019-panini-crown-royale</text:p>
      <text:p text:style-name="Standard"/>
      <text:p text:style-name="Standard">2019 Panini Eminence</text:p>
      <text:p text:style-name="Standard">https://www.sportscardspro.com/console/basketball-cards-2019-panini-eminence</text:p>
      <text:p text:style-name="Standard"/>
      <text:p text:style-name="Standard">2019 Panini Encased</text:p>
      <text:p text:style-name="Standard"><text:soft-page-break/>https://www.sportscardspro.com/console/basketball-cards-2019-panini-encased</text:p>
      <text:p text:style-name="Standard"/>
      <text:p text:style-name="Standard">2019 Panini Flawless</text:p>
      <text:p text:style-name="Standard">https://www.sportscardspro.com/console/basketball-cards-2019-panini-flawless</text:p>
      <text:p text:style-name="Standard"/>
      <text:p text:style-name="Standard">2019 Panini Illusions</text:p>
      <text:p text:style-name="Standard">https://www.sportscardspro.com/console/basketball-cards-2019-panini-illusions</text:p>
      <text:p text:style-name="Standard"/>
      <text:p text:style-name="Standard">2019 Panini Immaculate Collection</text:p>
      <text:p text:style-name="Standard">https://www.sportscardspro.com/console/basketball-cards-2019-panini-immaculate-collection</text:p>
      <text:p text:style-name="Standard"/>
      <text:p text:style-name="Standard">2019 Panini Impeccable</text:p>
      <text:p text:style-name="Standard">https://www.sportscardspro.com/console/basketball-cards-2019-panini-impeccable</text:p>
      <text:p text:style-name="Standard"/>
      <text:p text:style-name="Standard">2019 Panini Mosaic</text:p>
      <text:p text:style-name="Standard">https://www.sportscardspro.com/console/basketball-cards-2019-panini-mosaic</text:p>
      <text:p text:style-name="Standard"/>
      <text:p text:style-name="Standard">2019 Panini National Treasures</text:p>
      <text:p text:style-name="Standard">https://www.sportscardspro.com/console/basketball-cards-2019-panini-national-treasures</text:p>
      <text:p text:style-name="Standard"/>
      <text:p text:style-name="Standard">2019 Panini Noir</text:p>
      <text:p text:style-name="Standard">https://www.sportscardspro.com/console/basketball-cards-2019-panini-noir</text:p>
      <text:p text:style-name="Standard"/>
      <text:p text:style-name="Standard">2019 Panini Obsidian</text:p>
      <text:p text:style-name="Standard">https://www.sportscardspro.com/console/basketball-cards-2019-panini-obsidian</text:p>
      <text:p text:style-name="Standard"/>
      <text:p text:style-name="Standard">2019 Panini One and One</text:p>
      <text:p text:style-name="Standard">https://www.sportscardspro.com/console/basketball-cards-2019-panini-one-and-one</text:p>
      <text:p text:style-name="Standard"/>
      <text:p text:style-name="Standard">2019 Panini Opulence</text:p>
      <text:p text:style-name="Standard">https://www.sportscardspro.com/console/basketball-cards-2019-panini-opulence</text:p>
      <text:p text:style-name="Standard"/>
      <text:p text:style-name="Standard">2019 Panini Origins</text:p>
      <text:p text:style-name="Standard">https://www.sportscardspro.com/console/basketball-cards-2019-panini-origins</text:p>
      <text:p text:style-name="Standard"/>
      <text:p text:style-name="Standard">2019 Panini Prizm</text:p>
      <text:p text:style-name="Standard">https://www.sportscardspro.com/console/basketball-cards-2019-panini-prizm</text:p>
      <text:p text:style-name="Standard"/>
      <text:p text:style-name="Standard">2019 Panini Revolution</text:p>
      <text:p text:style-name="Standard">https://www.sportscardspro.com/console/basketball-cards-2019-panini-revolution</text:p>
      <text:p text:style-name="Standard"/>
      <text:p text:style-name="Standard">2019 Panini Select</text:p>
      <text:p text:style-name="Standard">https://www.sportscardspro.com/console/basketball-cards-2019-panini-select</text:p>
      <text:p text:style-name="Standard"/>
      <text:p text:style-name="Standard">2019 Panini Spectra</text:p>
      <text:p text:style-name="Standard">https://www.sportscardspro.com/console/basketball-cards-2019-panini-spectra</text:p>
      <text:p text:style-name="Standard"/>
      <text:p text:style-name="Standard">2019 Panini Status</text:p>
      <text:p text:style-name="Standard">https://www.sportscardspro.com/console/basketball-cards-2019-panini-stat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5:41:14</meta:creation-date>
    <meta:generator>OpenOffice/4.1.11$Unix OpenOffice.org_project/4111m1$Build-9808</meta:generator>
    <meta:document-statistic meta:table-count="0" meta:image-count="0" meta:object-count="0" meta:page-count="2" meta:paragraph-count="66" meta:word-count="139" meta:character-count="3214"/>
    <dc:date>2026-06-21T15:42:08</dc:date>
    <dc:creator>zach seabolt</dc:creator>
    <meta:editing-duration>PT54S</meta:editing-duration>
    <meta:editing-cycles>1</meta:editing-cycles>
  </office:meta>
</office:document-meta>
</file>