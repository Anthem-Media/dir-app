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3-24 Fleer Ultra</text:p>
      <text:p text:style-name="Standard"/>
      <text:p text:style-name="Standard">https://www.sportscardspro.com/console/hockey-cards-2023-fleer-ultra</text:p>
      <text:p text:style-name="Standard"/>
      <text:p text:style-name="Standard">2023-24 O-Pee-Chee</text:p>
      <text:p text:style-name="Standard"/>
      <text:p text:style-name="Standard">https://www.sportscardspro.com/console/hockey-cards-2023-o-pee-chee</text:p>
      <text:p text:style-name="Standard"/>
      <text:p text:style-name="Standard">2023-24 O-Pee-Chee Platinum</text:p>
      <text:p text:style-name="Standard"/>
      <text:p text:style-name="Standard">https://www.sportscardspro.com/console/hockey-cards-2023-o-pee-chee-platinum</text:p>
      <text:p text:style-name="Standard"/>
      <text:p text:style-name="Standard">2023-24 Parkhurst</text:p>
      <text:p text:style-name="Standard"/>
      <text:p text:style-name="Standard">https://www.sportscardspro.com/console/hockey-cards-2023-parkhurst</text:p>
      <text:p text:style-name="Standard"/>
      <text:p text:style-name="Standard">2023-24 Parkhurst Champions</text:p>
      <text:p text:style-name="Standard"/>
      <text:p text:style-name="Standard">https://www.sportscardspro.com/console/hockey-cards-2023-parkhurst-champions</text:p>
      <text:p text:style-name="Standard"/>
      <text:p text:style-name="Standard">2023-24 SkyBox E-X 2000</text:p>
      <text:p text:style-name="Standard"/>
      <text:p text:style-name="Standard">https://www.sportscardspro.com/console/hockey-cards-2023-skybox-e-x-2000</text:p>
      <text:p text:style-name="Standard"/>
      <text:p text:style-name="Standard">2023-24 SkyBox Metal Universe</text:p>
      <text:p text:style-name="Standard"/>
      <text:p text:style-name="Standard">https://www.sportscardspro.com/console/hockey-cards-2023-skybox-metal-universe</text:p>
      <text:p text:style-name="Standard"/>
      <text:p text:style-name="Standard">2023-24 SP</text:p>
      <text:p text:style-name="Standard"/>
      <text:p text:style-name="Standard">https://www.sportscardspro.com/console/hockey-cards-2023-sp</text:p>
      <text:p text:style-name="Standard"/>
      <text:p text:style-name="Standard">2023-24 SP Authentic</text:p>
      <text:p text:style-name="Standard"/>
      <text:p text:style-name="Standard">https://www.sportscardspro.com/console/hockey-cards-2023-sp-authentic</text:p>
      <text:p text:style-name="Standard"/>
      <text:p text:style-name="Standard">2023-24 SP Game Used</text:p>
      <text:p text:style-name="Standard"/>
      <text:p text:style-name="Standard">https://www.sportscardspro.com/console/hockey-cards-2023-sp-game-used</text:p>
      <text:p text:style-name="Standard"/>
      <text:p text:style-name="Standard">2023-24 SPx</text:p>
      <text:p text:style-name="Standard"/>
      <text:p text:style-name="Standard">https://www.sportscardspro.com/console/hockey-cards-2023-spx</text:p>
      <text:p text:style-name="Standard"/>
      <text:p text:style-name="Standard">2023-24 Upper Deck</text:p>
      <text:p text:style-name="Standard"/>
      <text:p text:style-name="Standard">https://www.sportscardspro.com/console/hockey-cards-2023-upper-deck</text:p>
      <text:p text:style-name="Standard"/>
      <text:p text:style-name="Standard">2023-24 Upper Deck Allure</text:p>
      <text:p text:style-name="Standard"><text:soft-page-break/></text:p>
      <text:p text:style-name="Standard">https://www.sportscardspro.com/console/hockey-cards-2023-upper-deck-allure</text:p>
      <text:p text:style-name="Standard"/>
      <text:p text:style-name="Standard">2023-24 Upper Deck Artifacts</text:p>
      <text:p text:style-name="Standard"/>
      <text:p text:style-name="Standard">https://www.sportscardspro.com/console/hockey-cards-2023-upper-deck-artifacts</text:p>
      <text:p text:style-name="Standard"/>
      <text:p text:style-name="Standard">2023-24 Upper Deck Black Diamond</text:p>
      <text:p text:style-name="Standard"/>
      <text:p text:style-name="Standard">https://www.sportscardspro.com/console/hockey-cards-2023-upper-deck-black-diamond</text:p>
      <text:p text:style-name="Standard"/>
      <text:p text:style-name="Standard">2023-24 Upper Deck Clear Cut</text:p>
      <text:p text:style-name="Standard"/>
      <text:p text:style-name="Standard">https://www.sportscardspro.com/console/hockey-cards-2023-upper-deck-clear-cut</text:p>
      <text:p text:style-name="Standard"/>
      <text:p text:style-name="Standard">2023-24 Upper Deck Credentials</text:p>
      <text:p text:style-name="Standard"/>
      <text:p text:style-name="Standard">https://www.sportscardspro.com/console/hockey-cards-2023-upper-deck-credentials</text:p>
      <text:p text:style-name="Standard"/>
      <text:p text:style-name="Standard">2023-24 Upper Deck Engrained</text:p>
      <text:p text:style-name="Standard"/>
      <text:p text:style-name="Standard">https://www.sportscardspro.com/console/hockey-cards-2023-upper-deck-engrained</text:p>
      <text:p text:style-name="Standard"/>
      <text:p text:style-name="Standard">2023-24 Upper Deck Ice</text:p>
      <text:p text:style-name="Standard"/>
      <text:p text:style-name="Standard">https://www.sportscardspro.com/console/hockey-cards-2023-upper-deck-ice</text:p>
      <text:p text:style-name="Standard"/>
      <text:p text:style-name="Standard">2023-24 Upper Deck MVP</text:p>
      <text:p text:style-name="Standard"/>
      <text:p text:style-name="Standard">https://www.sportscardspro.com/console/hockey-cards-2023-upper-deck-mvp</text:p>
      <text:p text:style-name="Standard"/>
      <text:p text:style-name="Standard">2023-24 Upper Deck Ovation</text:p>
      <text:p text:style-name="Standard"/>
      <text:p text:style-name="Standard">https://www.sportscardspro.com/console/hockey-cards-2023-upper-deck-ovation</text:p>
      <text:p text:style-name="Standard"/>
      <text:p text:style-name="Standard">2023-24 Upper Deck Premier</text:p>
      <text:p text:style-name="Standard"/>
      <text:p text:style-name="Standard">https://www.sportscardspro.com/console/hockey-cards-2023-upper-deck-premier</text:p>
      <text:p text:style-name="Standard"/>
      <text:p text:style-name="Standard">2023-24 Upper Deck Rookie Debut</text:p>
      <text:p text:style-name="Standard"/>
      <text:p text:style-name="Standard">https://www.sportscardspro.com/console/hockey-cards-2023-upper-deck-rookie-debut</text:p>
      <text:p text:style-name="Standard"/>
      <text:p text:style-name="Standard">2023-24 Upper Deck Synergy</text:p>
      <text:p text:style-name="Standard"/>
      <text:p text:style-name="Standard">https://www.sportscardspro.com/console/hockey-cards-2023-upper-deck-synergy</text:p>
      <text:p text:style-name="Standard"/>
      <text:p text:style-name="Standard">2023-24 Upper Deck The Cup</text:p>
      <text:p text:style-name="Standard"/>
      <text:p text:style-name="Standard"><text:soft-page-break/>https://www.sportscardspro.com/console/hockey-cards-2023-upper-deck-the-cup</text:p>
      <text:p text:style-name="Standard"/>
      <text:p text:style-name="Standard">2023-24 Upper Deck Trilogy</text:p>
      <text:p text:style-name="Standard"/>
      <text:p text:style-name="Standard">https://www.sportscardspro.com/console/hockey-cards-2023-upper-deck-trilogy</text:p>
      <text:p text:style-name="Standard"/>
      <text:p text:style-name="Standard">2023-24 Upper Deck Ultimate Collection</text:p>
      <text:p text:style-name="Standard"/>
      <text:p text:style-name="Standard"><text:a xlink:type="simple" xlink:href="https://www.sportscardspro.com/console/hockey-cards-2023-upper-deck-ultimate-collection" text:style-name="Internet_20_link" text:visited-style-name="Visited_20_Internet_20_Link">https://www.sportscardspro.com/console/hockey-cards-2023-upper-deck-ultimate-collection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02:35</meta:creation-date>
    <dc:date>2026-06-21T13:05:08</dc:date>
    <dc:creator>zach seabolt</dc:creator>
    <meta:editing-duration>PT2M33S</meta:editing-duration>
    <meta:editing-cycles>2</meta:editing-cycles>
    <meta:generator>OpenOffice/4.1.11$Unix OpenOffice.org_project/4111m1$Build-9808</meta:generator>
    <meta:document-statistic meta:table-count="0" meta:image-count="0" meta:object-count="0" meta:page-count="3" meta:paragraph-count="54" meta:word-count="127" meta:character-count="2630"/>
  </office:meta>
</office:document-meta>
</file>