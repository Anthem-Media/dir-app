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5 Bowman</text:p>
      <text:p text:style-name="Standard">https://www.sportscardspro.com/console/basketball-cards-2025-bowman</text:p>
      <text:p text:style-name="Standard"/>
      <text:p text:style-name="Standard">2025 Bowman Sapphire Edition</text:p>
      <text:p text:style-name="Standard">https://www.sportscardspro.com/console/basketball-cards-2025-bowman-sapphire-edition</text:p>
      <text:p text:style-name="Standard"/>
      <text:p text:style-name="Standard">2025 Donruss</text:p>
      <text:p text:style-name="Standard">https://www.sportscardspro.com/console/basketball-cards-2025-donruss</text:p>
      <text:p text:style-name="Standard"/>
      <text:p text:style-name="Standard">2025 Finest</text:p>
      <text:p text:style-name="Standard">https://www.sportscardspro.com/console/basketball-cards-2025-finest</text:p>
      <text:p text:style-name="Standard"/>
      <text:p text:style-name="Standard">2025 Hoops</text:p>
      <text:p text:style-name="Standard">https://www.sportscardspro.com/console/basketball-cards-2025-hoops</text:p>
      <text:p text:style-name="Standard"/>
      <text:p text:style-name="Standard">2025 Panini Noir</text:p>
      <text:p text:style-name="Standard">https://www.sportscardspro.com/console/basketball-cards-2025-panini-noir</text:p>
      <text:p text:style-name="Standard"/>
      <text:p text:style-name="Standard">2025 Panini Signature Series</text:p>
      <text:p text:style-name="Standard">https://www.sportscardspro.com/console/basketball-cards-2025-panini-signature-series</text:p>
      <text:p text:style-name="Standard"/>
      <text:p text:style-name="Standard">2025 Topps</text:p>
      <text:p text:style-name="Standard">https://www.sportscardspro.com/console/basketball-cards-2025-topps</text:p>
      <text:p text:style-name="Standard"/>
      <text:p text:style-name="Standard">2025 Topps 3</text:p>
      <text:p text:style-name="Standard">https://www.sportscardspro.com/console/basketball-cards-2025-topps-3</text:p>
      <text:p text:style-name="Standard"/>
      <text:p text:style-name="Standard">2025 Topps Chrome</text:p>
      <text:p text:style-name="Standard">https://www.sportscardspro.com/console/basketball-cards-2025-topps-chrome</text:p>
      <text:p text:style-name="Standard"/>
      <text:p text:style-name="Standard">2025 Topps Chrome Cosmic</text:p>
      <text:p text:style-name="Standard">https://www.sportscardspro.com/console/basketball-cards-2025-topps-chrome-cosmic</text:p>
      <text:p text:style-name="Standard"/>
      <text:p text:style-name="Standard">2025 Topps Chrome Sapphire Edition</text:p>
      <text:p text:style-name="Standard">https://www.sportscardspro.com/console/basketball-cards-2025-topps-chrome-sapphire-edition</text:p>
      <text:p text:style-name="Standard"/>
      <text:p text:style-name="Standard">2025 Topps Holiday</text:p>
      <text:p text:style-name="Standard">https://www.sportscardspro.com/console/basketball-cards-2025-topps-holiday</text:p>
      <text:p text:style-name="Standard"/>
      <text:p text:style-name="Standard">2025 Topps Midnight</text:p>
      <text:p text:style-name="Standard">https://www.sportscardspro.com/console/basketball-cards-2025-topps-midnight</text:p>
      <text:p text:style-name="Standard"/>
      <text:p text:style-name="Standard">2025 Topps Motif</text:p>
      <text:p text:style-name="Standard">https://www.sportscardspro.com/console/basketball-cards-2025-topps-motif</text:p>
      <text:p text:style-name="Standard"/>
      <text:p text:style-name="Standard">2025 Topps Signature Class</text:p>
      <text:p text:style-name="Standard">https://www.sportscardspro.com/console/basketball-cards-2025-topps-signature-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5:47:48</meta:creation-date>
    <meta:generator>OpenOffice/4.1.11$Unix OpenOffice.org_project/4111m1$Build-9808</meta:generator>
    <meta:document-statistic meta:table-count="0" meta:image-count="0" meta:object-count="0" meta:page-count="1" meta:paragraph-count="32" meta:word-count="65" meta:character-count="1480"/>
    <dc:date>2026-06-21T17:13:11</dc:date>
    <dc:creator>zach seabolt</dc:creator>
    <meta:editing-duration>PT11S</meta:editing-duration>
    <meta:editing-cycles>1</meta:editing-cycles>
  </office:meta>
</office:document-meta>
</file>