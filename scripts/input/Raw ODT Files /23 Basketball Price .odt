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3 Donruss</text:p>
      <text:p text:style-name="Standard">https://www.sportscardspro.com/console/basketball-cards-2023-donruss</text:p>
      <text:p text:style-name="Standard"/>
      <text:p text:style-name="Standard">2023 Donruss Elite</text:p>
      <text:p text:style-name="Standard">https://www.sportscardspro.com/console/basketball-cards-2023-donruss-elite</text:p>
      <text:p text:style-name="Standard"/>
      <text:p text:style-name="Standard">2023 Donruss Optic</text:p>
      <text:p text:style-name="Standard">https://www.sportscardspro.com/console/basketball-cards-2023-donruss-optic</text:p>
      <text:p text:style-name="Standard"/>
      <text:p text:style-name="Standard">2023 Finest</text:p>
      <text:p text:style-name="Standard">https://www.sportscardspro.com/console/basketball-cards-2023-finest</text:p>
      <text:p text:style-name="Standard"/>
      <text:p text:style-name="Standard">2023 Hoops</text:p>
      <text:p text:style-name="Standard">https://www.sportscardspro.com/console/basketball-cards-2023-hoops</text:p>
      <text:p text:style-name="Standard"/>
      <text:p text:style-name="Standard">2023 Hoops Haunted Hoops</text:p>
      <text:p text:style-name="Standard">https://www.sportscardspro.com/console/basketball-cards-2023-hoops-haunted-hoops</text:p>
      <text:p text:style-name="Standard"/>
      <text:p text:style-name="Standard">2023 Hoops Premium Stock</text:p>
      <text:p text:style-name="Standard">https://www.sportscardspro.com/console/basketball-cards-2023-hoops-premium-stock</text:p>
      <text:p text:style-name="Standard"/>
      <text:p text:style-name="Standard">2023 Hoops Winter</text:p>
      <text:p text:style-name="Standard">https://www.sportscardspro.com/console/basketball-cards-2023-hoops-winter</text:p>
      <text:p text:style-name="Standard"/>
      <text:p text:style-name="Standard">2023 Panini Black</text:p>
      <text:p text:style-name="Standard">https://www.sportscardspro.com/console/basketball-cards-2023-panini-black</text:p>
      <text:p text:style-name="Standard"/>
      <text:p text:style-name="Standard">2023 Panini Contenders</text:p>
      <text:p text:style-name="Standard">https://www.sportscardspro.com/console/basketball-cards-2023-panini-contenders</text:p>
      <text:p text:style-name="Standard"/>
      <text:p text:style-name="Standard">2023 Panini Contenders Optic</text:p>
      <text:p text:style-name="Standard">https://www.sportscardspro.com/console/basketball-cards-2023-panini-contenders-optic</text:p>
      <text:p text:style-name="Standard"/>
      <text:p text:style-name="Standard">2023 Panini Court Kings</text:p>
      <text:p text:style-name="Standard">https://www.sportscardspro.com/console/basketball-cards-2023-panini-court-kings</text:p>
      <text:p text:style-name="Standard"/>
      <text:p text:style-name="Standard">2023 Panini Crown Royale</text:p>
      <text:p text:style-name="Standard">https://www.sportscardspro.com/console/basketball-cards-2023-panini-crown-royale</text:p>
      <text:p text:style-name="Standard"/>
      <text:p text:style-name="Standard">2023 Panini Flawless</text:p>
      <text:p text:style-name="Standard">https://www.sportscardspro.com/console/basketball-cards-2023-panini-flawless</text:p>
      <text:p text:style-name="Standard"/>
      <text:p text:style-name="Standard">2023 Panini Immaculate Collection</text:p>
      <text:p text:style-name="Standard">https://www.sportscardspro.com/console/basketball-cards-2023-panini-immaculate-collection</text:p>
      <text:p text:style-name="Standard"/>
      <text:p text:style-name="Standard">2023 Panini Impeccable</text:p>
      <text:p text:style-name="Standard">https://www.sportscardspro.com/console/basketball-cards-2023-panini-impeccable</text:p>
      <text:p text:style-name="Standard"/>
      <text:p text:style-name="Standard">2023 Panini Mosaic</text:p>
      <text:p text:style-name="Standard"><text:soft-page-break/>https://www.sportscardspro.com/console/basketball-cards-2023-panini-mosaic</text:p>
      <text:p text:style-name="Standard"/>
      <text:p text:style-name="Standard">2023 Panini National Treasures</text:p>
      <text:p text:style-name="Standard">https://www.sportscardspro.com/console/basketball-cards-2023-panini-national-treasures</text:p>
      <text:p text:style-name="Standard"/>
      <text:p text:style-name="Standard">2023 Panini Noir</text:p>
      <text:p text:style-name="Standard">https://www.sportscardspro.com/console/basketball-cards-2023-panini-noir</text:p>
      <text:p text:style-name="Standard"/>
      <text:p text:style-name="Standard">2023 Panini Obsidian</text:p>
      <text:p text:style-name="Standard">https://www.sportscardspro.com/console/basketball-cards-2023-panini-obsidian</text:p>
      <text:p text:style-name="Standard"/>
      <text:p text:style-name="Standard">2023 Panini One and One</text:p>
      <text:p text:style-name="Standard">https://www.sportscardspro.com/console/basketball-cards-2023-panini-one-and-one</text:p>
      <text:p text:style-name="Standard"/>
      <text:p text:style-name="Standard">2023 Panini Origins</text:p>
      <text:p text:style-name="Standard">https://www.sportscardspro.com/console/basketball-cards-2023-panini-origins</text:p>
      <text:p text:style-name="Standard"/>
      <text:p text:style-name="Standard">2023 Panini Phoenix</text:p>
      <text:p text:style-name="Standard">https://www.sportscardspro.com/console/basketball-cards-2023-panini-phoenix</text:p>
      <text:p text:style-name="Standard"/>
      <text:p text:style-name="Standard">2023 Panini Photogenic</text:p>
      <text:p text:style-name="Standard">https://www.sportscardspro.com/console/basketball-cards-2023-panini-photogenic</text:p>
      <text:p text:style-name="Standard"/>
      <text:p text:style-name="Standard">2023 Panini Prizm</text:p>
      <text:p text:style-name="Standard">https://www.sportscardspro.com/console/basketball-cards-2023-panini-prizm</text:p>
      <text:p text:style-name="Standard"/>
      <text:p text:style-name="Standard">2023 Panini Prizm Deca</text:p>
      <text:p text:style-name="Standard">https://www.sportscardspro.com/console/basketball-cards-2023-panini-prizm-deca</text:p>
      <text:p text:style-name="Standard"/>
      <text:p text:style-name="Standard">2023 Panini Recon</text:p>
      <text:p text:style-name="Standard">https://www.sportscardspro.com/console/basketball-cards-2023-panini-recon</text:p>
      <text:p text:style-name="Standard"/>
      <text:p text:style-name="Standard">2023 Panini Revolution</text:p>
      <text:p text:style-name="Standard">https://www.sportscardspro.com/console/basketball-cards-2023-panini-revolution</text:p>
      <text:p text:style-name="Standard"/>
      <text:p text:style-name="Standard">2023 Panini Select</text:p>
      <text:p text:style-name="Standard">https://www.sportscardspro.com/console/basketball-cards-2023-panini-select</text:p>
      <text:p text:style-name="Standard"/>
      <text:p text:style-name="Standard">2023 Panini Spectra</text:p>
      <text:p text:style-name="Standard">https://www.sportscardspro.com/console/basketball-cards-2023-panini-spectra</text:p>
      <text:p text:style-name="Standard"/>
      <text:p text:style-name="Standard">2023 Panini Top Class NBA</text:p>
      <text:p text:style-name="Standard">https://www.sportscardspro.com/console/basketball-cards-2023-panini-top-class-nba</text:p>
      <text:p text:style-name="Standard"/>
      <text:p text:style-name="Standard">2023 Topps 3</text:p>
      <text:p text:style-name="Standard">https://www.sportscardspro.com/console/basketball-cards-2023-topps-3</text:p>
      <text:p text:style-name="Standard"/>
      <text:p text:style-name="Standard">2023 Topps Chrome</text:p>
      <text:p text:style-name="Standard">https://www.sportscardspro.com/console/basketball-cards-2023-topps-chrome</text:p>
      <text:p text:style-name="Standard"><text:soft-page-break/></text:p>
      <text:p text:style-name="Standard">2023 Topps Chrome Cosmic</text:p>
      <text:p text:style-name="Standard">https://www.sportscardspro.com/console/basketball-cards-2023-topps-chrome-cosmic</text:p>
      <text:p text:style-name="Standard"/>
      <text:p text:style-name="Standard">2023 Topps Chrome Sapphire Edition</text:p>
      <text:p text:style-name="Standard">https://www.sportscardspro.com/console/basketball-cards-2023-topps-chrome-sapphire-edition</text:p>
      <text:p text:style-name="Standard"/>
      <text:p text:style-name="Standard">2023 Topps Midnight</text:p>
      <text:p text:style-name="Standard">https://www.sportscardspro.com/console/basketball-cards-2023-topps-midnight</text:p>
      <text:p text:style-name="Standard"/>
      <text:p text:style-name="Standard">2023 Topps Motif</text:p>
      <text:p text:style-name="Standard">https://www.sportscardspro.com/console/basketball-cards-2023-topps-motif</text:p>
      <text:p text:style-name="Standard"/>
      <text:p text:style-name="Standard">2023 Topps Royalty</text:p>
      <text:p text:style-name="Standard">https://www.sportscardspro.com/console/basketball-cards-2023-topps-royal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5:44:42</meta:creation-date>
    <meta:generator>OpenOffice/4.1.11$Unix OpenOffice.org_project/4111m1$Build-9808</meta:generator>
    <meta:document-statistic meta:table-count="0" meta:image-count="0" meta:object-count="0" meta:page-count="3" meta:paragraph-count="76" meta:word-count="164" meta:character-count="3668"/>
    <dc:date>2026-06-21T15:45:20</dc:date>
    <dc:creator>zach seabolt</dc:creator>
    <meta:editing-duration>PT38S</meta:editing-duration>
    <meta:editing-cycles>1</meta:editing-cycles>
  </office:meta>
</office:document-meta>
</file>