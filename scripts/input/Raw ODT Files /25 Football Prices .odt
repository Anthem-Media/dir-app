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25 Donruss</text:p>
      <text:p text:style-name="Standard"/>
      <text:p text:style-name="Standard">https://www.sportscardspro.com/console/football-cards-2025-donruss</text:p>
      <text:p text:style-name="Standard"/>
      <text:p text:style-name="Standard">2025 Donruss Elite</text:p>
      <text:p text:style-name="Standard"/>
      <text:p text:style-name="Standard">https://www.sportscardspro.com/console/football-cards-2025-donruss-elite</text:p>
      <text:p text:style-name="Standard"/>
      <text:p text:style-name="Standard">2025 Donruss Optic</text:p>
      <text:p text:style-name="Standard"/>
      <text:p text:style-name="Standard">https://www.sportscardspro.com/console/football-cards-2025-donruss-optic</text:p>
      <text:p text:style-name="Standard"/>
      <text:p text:style-name="Standard">2025 Donruss Rookies &amp; Highlights</text:p>
      <text:p text:style-name="Standard"/>
      <text:p text:style-name="Standard">https://www.sportscardspro.com/console/football-cards-2025-donruss-rookies-and-highlights</text:p>
      <text:p text:style-name="Standard"/>
      <text:p text:style-name="Standard">2025 Finest</text:p>
      <text:p text:style-name="Standard"/>
      <text:p text:style-name="Standard">https://www.sportscardspro.com/console/football-cards-2025-finest</text:p>
      <text:p text:style-name="Standard"/>
      <text:p text:style-name="Standard">2025 Leaf Eclectic Signature Series - Mythical Prismatic Dragon Printing Plates Black</text:p>
      <text:p text:style-name="Standard"/>
      <text:p text:style-name="Standard">https://www.sportscardspro.com/console/football-cards-2025-leaf-eclectic-signature-series-mythical-prismatic-dragon-printing-plates-black</text:p>
      <text:p text:style-name="Standard"/>
      <text:p text:style-name="Standard">2025 Leaf Eclectic Signature Series - Mythical Prismatic Dragon Printing Plates Cyan</text:p>
      <text:p text:style-name="Standard"/>
      <text:p text:style-name="Standard">https://www.sportscardspro.com/console/football-cards-2025-leaf-eclectic-signature-series-mythical-prismatic-dragon-printing-plates-cyan</text:p>
      <text:p text:style-name="Standard"/>
      <text:p text:style-name="Standard">2025 Leaf Eclectic Signature Series - Mythical Prismatic Dragon Printing Plates Magenta</text:p>
      <text:p text:style-name="Standard"/>
      <text:p text:style-name="Standard">https://www.sportscardspro.com/console/football-cards-2025-leaf-eclectic-signature-series-mythical-prismatic-dragon-printing-plates-magenta</text:p>
      <text:p text:style-name="Standard"/>
      <text:p text:style-name="Standard">2025 Leaf Eclectic Signature Series - Mythical Prismatic Dragon Printing Plates Yellow</text:p>
      <text:p text:style-name="Standard"/>
      <text:p text:style-name="Standard">https://www.sportscardspro.com/console/football-cards-2025-leaf-eclectic-signature-series-mythical-prismatic-dragon-printing-plates-yellow</text:p>
      <text:p text:style-name="Standard"/>
      <text:p text:style-name="Standard">2025 Panini Absolute</text:p>
      <text:p text:style-name="Standard"/>
      <text:p text:style-name="Standard">https://www.sportscardspro.com/console/football-cards-2025-panini-absolute</text:p>
      <text:p text:style-name="Standard"/>
      <text:p text:style-name="Standard">2025 Panini Absolute Countdown Calendar</text:p>
      <text:p text:style-name="Standard"/>
      <text:p text:style-name="Standard">https://www.sportscardspro.com/console/football-cards-2025-panini-absolute-countdown-calendar</text:p>
      <text:p text:style-name="Standard"/>
      <text:p text:style-name="Standard">2025 Panini Black</text:p>
      <text:p text:style-name="Standard"><text:soft-page-break/></text:p>
      <text:p text:style-name="Standard">https://www.sportscardspro.com/console/football-cards-2025-panini-black</text:p>
      <text:p text:style-name="Standard"/>
      <text:p text:style-name="Standard">2025 Panini Certified</text:p>
      <text:p text:style-name="Standard"/>
      <text:p text:style-name="Standard">https://www.sportscardspro.com/console/football-cards-2025-panini-certified</text:p>
      <text:p text:style-name="Standard"/>
      <text:p text:style-name="Standard">2025 Panini Flawless</text:p>
      <text:p text:style-name="Standard"/>
      <text:p text:style-name="Standard">https://www.sportscardspro.com/console/football-cards-2025-panini-flawless</text:p>
      <text:p text:style-name="Standard"/>
      <text:p text:style-name="Standard">2025 Panini Honors</text:p>
      <text:p text:style-name="Standard"/>
      <text:p text:style-name="Standard">https://www.sportscardspro.com/console/football-cards-2025-panini-honors</text:p>
      <text:p text:style-name="Standard"/>
      <text:p text:style-name="Standard">2025 Panini Immaculate Collection</text:p>
      <text:p text:style-name="Standard"/>
      <text:p text:style-name="Standard">https://www.sportscardspro.com/console/football-cards-2025-panini-immaculate-collection</text:p>
      <text:p text:style-name="Standard"/>
      <text:p text:style-name="Standard">2025 Panini Impeccable</text:p>
      <text:p text:style-name="Standard"/>
      <text:p text:style-name="Standard">https://www.sportscardspro.com/console/football-cards-2025-panini-impeccable</text:p>
      <text:p text:style-name="Standard"/>
      <text:p text:style-name="Standard">2025 Panini Luminance</text:p>
      <text:p text:style-name="Standard"/>
      <text:p text:style-name="Standard">https://www.sportscardspro.com/console/football-cards-2025-panini-luminance</text:p>
      <text:p text:style-name="Standard"/>
      <text:p text:style-name="Standard">2025 Panini Mosaic</text:p>
      <text:p text:style-name="Standard"/>
      <text:p text:style-name="Standard">https://www.sportscardspro.com/console/football-cards-2025-panini-mosaic</text:p>
      <text:p text:style-name="Standard"/>
      <text:p text:style-name="Standard">2025 Panini National Treasures</text:p>
      <text:p text:style-name="Standard"/>
      <text:p text:style-name="Standard">https://www.sportscardspro.com/console/football-cards-2025-panini-national-treasures</text:p>
      <text:p text:style-name="Standard"/>
      <text:p text:style-name="Standard">2025 Panini Origins</text:p>
      <text:p text:style-name="Standard"/>
      <text:p text:style-name="Standard">https://www.sportscardspro.com/console/football-cards-2025-panini-origins</text:p>
      <text:p text:style-name="Standard"/>
      <text:p text:style-name="Standard">2025 Panini Phoenix</text:p>
      <text:p text:style-name="Standard"/>
      <text:p text:style-name="Standard">https://www.sportscardspro.com/console/football-cards-2025-panini-phoenix</text:p>
      <text:p text:style-name="Standard"/>
      <text:p text:style-name="Standard">2025 Panini Photogenic</text:p>
      <text:p text:style-name="Standard"/>
      <text:p text:style-name="Standard">https://www.sportscardspro.com/console/football-cards-2025-panini-photogenic</text:p>
      <text:p text:style-name="Standard"/>
      <text:p text:style-name="Standard">2025 Panini Prizm</text:p>
      <text:p text:style-name="Standard"/>
      <text:p text:style-name="Standard"><text:soft-page-break/>https://www.sportscardspro.com/console/football-cards-2025-panini-prizm</text:p>
      <text:p text:style-name="Standard"/>
      <text:p text:style-name="Standard">2025 Panini Prizm Black</text:p>
      <text:p text:style-name="Standard"/>
      <text:p text:style-name="Standard">https://www.sportscardspro.com/console/football-cards-2025-panini-prizm-black</text:p>
      <text:p text:style-name="Standard"/>
      <text:p text:style-name="Standard">2025 Panini Revolution</text:p>
      <text:p text:style-name="Standard"/>
      <text:p text:style-name="Standard">https://www.sportscardspro.com/console/football-cards-2025-panini-revolution</text:p>
      <text:p text:style-name="Standard"/>
      <text:p text:style-name="Standard">2025 Panini Rookies &amp; Stars</text:p>
      <text:p text:style-name="Standard"/>
      <text:p text:style-name="Standard">https://www.sportscardspro.com/console/football-cards-2025-panini-rookies-and-stars</text:p>
      <text:p text:style-name="Standard"/>
      <text:p text:style-name="Standard">2025 Panini Select</text:p>
      <text:p text:style-name="Standard"/>
      <text:p text:style-name="Standard">https://www.sportscardspro.com/console/football-cards-2025-panini-select</text:p>
      <text:p text:style-name="Standard"/>
      <text:p text:style-name="Standard">2025 Panini Silhouette</text:p>
      <text:p text:style-name="Standard"/>
      <text:p text:style-name="Standard">https://www.sportscardspro.com/console/football-cards-2025-panini-silhouette</text:p>
      <text:p text:style-name="Standard"/>
      <text:p text:style-name="Standard">2025 Score</text:p>
      <text:p text:style-name="Standard"/>
      <text:p text:style-name="Standard">https://www.sportscardspro.com/console/football-cards-2025-score</text:p>
      <text:p text:style-name="Standard"/>
      <text:p text:style-name="Standard">2025 Score Supplemental</text:p>
      <text:p text:style-name="Standard"/>
      <text:p text:style-name="Standard">https://www.sportscardspro.com/console/football-cards-2025-score-supplemental</text:p>
      <text:p text:style-name="Standard"/>
      <text:p text:style-name="Standard">2025 Score-A-Treat</text:p>
      <text:p text:style-name="Standard"/>
      <text:p text:style-name="Standard">https://www.sportscardspro.com/console/football-cards-2025-score-a-treat</text:p>
      <text:p text:style-name="Standard"/>
      <text:p text:style-name="Standard">2025 Topps Chrome</text:p>
      <text:p text:style-name="Standard"/>
      <text:p text:style-name="Standard">https://www.sportscardspro.com/console/football-cards-2025-topps-chrome</text:p>
      <text:p text:style-name="Standard"/>
      <text:p text:style-name="Standard">2025 Topps Chrome Cosmic</text:p>
      <text:p text:style-name="Standard"/>
      <text:p text:style-name="Standard">https://www.sportscardspro.com/console/football-cards-2025-topps-chrome-cosmic</text:p>
      <text:p text:style-name="Standard"/>
      <text:p text:style-name="Standard">2025 Topps Chrome Sapphire Edition</text:p>
      <text:p text:style-name="Standard"/>
      <text:p text:style-name="Standard">https://www.sportscardspro.com/console/football-cards-2025-topps-chrome-sapphire-edition</text:p>
      <text:p text:style-name="Standard"/>
      <text:p text:style-name="Standard">2025 Topps Signature Class</text:p>
      <text:p text:style-name="Standard"/>
      <text:p text:style-name="Standard">https://www.sportscardspro.com/console/football-cards-2025-topps-signature-cl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3:31:55</meta:creation-date>
    <meta:document-statistic meta:table-count="0" meta:image-count="0" meta:object-count="0" meta:page-count="3" meta:paragraph-count="72" meta:word-count="189" meta:character-count="4008"/>
    <dc:date>2026-06-21T13:32:05</dc:date>
    <dc:creator>zach seabolt</dc:creator>
    <meta:editing-duration>PT10S</meta:editing-duration>
    <meta:editing-cycles>1</meta:editing-cycles>
    <meta:generator>OpenOffice/4.1.11$Unix OpenOffice.org_project/4111m1$Build-9808</meta:generator>
  </office:meta>
</office:document-meta>
</file>