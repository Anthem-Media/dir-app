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2 Donruss</text:p>
      <text:p text:style-name="Standard">https://www.sportscardspro.com/console/basketball-cards-2022-donruss</text:p>
      <text:p text:style-name="Standard"/>
      <text:p text:style-name="Standard">2022 Donruss Elite</text:p>
      <text:p text:style-name="Standard">https://www.sportscardspro.com/console/basketball-cards-2022-donruss-elite</text:p>
      <text:p text:style-name="Standard"/>
      <text:p text:style-name="Standard">2022 Donruss Optic</text:p>
      <text:p text:style-name="Standard">https://www.sportscardspro.com/console/basketball-cards-2022-donruss-optic</text:p>
      <text:p text:style-name="Standard"/>
      <text:p text:style-name="Standard">2022 Hoops</text:p>
      <text:p text:style-name="Standard">https://www.sportscardspro.com/console/basketball-cards-2022-hoops</text:p>
      <text:p text:style-name="Standard"/>
      <text:p text:style-name="Standard">2022 Hoops Winter</text:p>
      <text:p text:style-name="Standard">https://www.sportscardspro.com/console/basketball-cards-2022-hoops-winter</text:p>
      <text:p text:style-name="Standard"/>
      <text:p text:style-name="Standard">2022 Panini Black</text:p>
      <text:p text:style-name="Standard">https://www.sportscardspro.com/console/basketball-cards-2022-panini-black</text:p>
      <text:p text:style-name="Standard"/>
      <text:p text:style-name="Standard">2022 Panini Chronicles</text:p>
      <text:p text:style-name="Standard">https://www.sportscardspro.com/console/basketball-cards-2022-panini-chronicles</text:p>
      <text:p text:style-name="Standard"/>
      <text:p text:style-name="Standard">2022 Panini Contenders</text:p>
      <text:p text:style-name="Standard">https://www.sportscardspro.com/console/basketball-cards-2022-panini-contenders</text:p>
      <text:p text:style-name="Standard"/>
      <text:p text:style-name="Standard">2022 Panini Contenders Optic</text:p>
      <text:p text:style-name="Standard">https://www.sportscardspro.com/console/basketball-cards-2022-panini-contenders-optic</text:p>
      <text:p text:style-name="Standard"/>
      <text:p text:style-name="Standard">2022 Panini Court Kings</text:p>
      <text:p text:style-name="Standard">https://www.sportscardspro.com/console/basketball-cards-2022-panini-court-kings</text:p>
      <text:p text:style-name="Standard"/>
      <text:p text:style-name="Standard">2022 Panini Crown Royale</text:p>
      <text:p text:style-name="Standard">https://www.sportscardspro.com/console/basketball-cards-2022-panini-crown-royale</text:p>
      <text:p text:style-name="Standard"/>
      <text:p text:style-name="Standard">2022 Panini Flawless</text:p>
      <text:p text:style-name="Standard">https://www.sportscardspro.com/console/basketball-cards-2022-panini-flawless</text:p>
      <text:p text:style-name="Standard"/>
      <text:p text:style-name="Standard">2022 Panini Flux</text:p>
      <text:p text:style-name="Standard">https://www.sportscardspro.com/console/basketball-cards-2022-panini-flux</text:p>
      <text:p text:style-name="Standard"/>
      <text:p text:style-name="Standard">2022 Panini Immaculate Collection</text:p>
      <text:p text:style-name="Standard">https://www.sportscardspro.com/console/basketball-cards-2022-panini-immaculate-collection</text:p>
      <text:p text:style-name="Standard"/>
      <text:p text:style-name="Standard">2022 Panini Impeccable</text:p>
      <text:p text:style-name="Standard">https://www.sportscardspro.com/console/basketball-cards-2022-panini-impeccable</text:p>
      <text:p text:style-name="Standard"/>
      <text:p text:style-name="Standard">2022 Panini Mosaic</text:p>
      <text:p text:style-name="Standard">https://www.sportscardspro.com/console/basketball-cards-2022-panini-mosaic</text:p>
      <text:p text:style-name="Standard"/>
      <text:p text:style-name="Standard">2022 Panini National Treasures</text:p>
      <text:p text:style-name="Standard"><text:soft-page-break/>https://www.sportscardspro.com/console/basketball-cards-2022-panini-national-treasures</text:p>
      <text:p text:style-name="Standard"/>
      <text:p text:style-name="Standard">2022 Panini Noir</text:p>
      <text:p text:style-name="Standard">https://www.sportscardspro.com/console/basketball-cards-2022-panini-noir</text:p>
      <text:p text:style-name="Standard"/>
      <text:p text:style-name="Standard">2022 Panini Obsidian</text:p>
      <text:p text:style-name="Standard">https://www.sportscardspro.com/console/basketball-cards-2022-panini-obsidian</text:p>
      <text:p text:style-name="Standard"/>
      <text:p text:style-name="Standard">2022 Panini One and One</text:p>
      <text:p text:style-name="Standard">https://www.sportscardspro.com/console/basketball-cards-2022-panini-one-and-one</text:p>
      <text:p text:style-name="Standard"/>
      <text:p text:style-name="Standard">2022 Panini Origins</text:p>
      <text:p text:style-name="Standard">https://www.sportscardspro.com/console/basketball-cards-2022-panini-origins</text:p>
      <text:p text:style-name="Standard"/>
      <text:p text:style-name="Standard">2022 Panini Photogenic</text:p>
      <text:p text:style-name="Standard">https://www.sportscardspro.com/console/basketball-cards-2022-panini-photogenic</text:p>
      <text:p text:style-name="Standard"/>
      <text:p text:style-name="Standard">2022 Panini Prizm</text:p>
      <text:p text:style-name="Standard">https://www.sportscardspro.com/console/basketball-cards-2022-panini-prizm</text:p>
      <text:p text:style-name="Standard"/>
      <text:p text:style-name="Standard">2022 Panini Recon</text:p>
      <text:p text:style-name="Standard">https://www.sportscardspro.com/console/basketball-cards-2022-panini-recon</text:p>
      <text:p text:style-name="Standard"/>
      <text:p text:style-name="Standard">2022 Panini Revolution</text:p>
      <text:p text:style-name="Standard">https://www.sportscardspro.com/console/basketball-cards-2022-panini-revolution</text:p>
      <text:p text:style-name="Standard"/>
      <text:p text:style-name="Standard">2022 Panini Select</text:p>
      <text:p text:style-name="Standard">https://www.sportscardspro.com/console/basketball-cards-2022-panini-select</text:p>
      <text:p text:style-name="Standard"/>
      <text:p text:style-name="Standard">2022 Panini Spectra</text:p>
      <text:p text:style-name="Standard">https://www.sportscardspro.com/console/basketball-cards-2022-panini-spect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5:43:49</meta:creation-date>
    <meta:generator>OpenOffice/4.1.11$Unix OpenOffice.org_project/4111m1$Build-9808</meta:generator>
    <meta:document-statistic meta:table-count="0" meta:image-count="0" meta:object-count="0" meta:page-count="2" meta:paragraph-count="54" meta:word-count="113" meta:character-count="2598"/>
    <dc:date>2026-06-21T15:44:41</dc:date>
    <dc:creator>zach seabolt</dc:creator>
    <meta:editing-duration>PT53S</meta:editing-duration>
    <meta:editing-cycles>1</meta:editing-cycles>
  </office:meta>
</office:document-meta>
</file>